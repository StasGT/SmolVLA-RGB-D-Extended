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face style:name="DejaVu Sans1" svg:font-family="'DejaVu Sans'" style:font-family-generic="swiss"/>
    <style:font-face style:name="DejaVu Sans Mono" svg:font-family="'DejaVu Sans Mono'"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701in" table:align="margins"/>
    </style:style>
    <style:style style:name="Table1.A" style:family="table-column">
      <style:table-column-properties style:column-width="3.3347in" style:rel-column-width="32767*"/>
    </style:style>
    <style:style style:name="Table1.B" style:family="table-column">
      <style:table-column-properties style:column-width="3.3354in" style:rel-column-width="32768*"/>
    </style:style>
    <style:style style:name="Table1.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line-height="150%" fo:text-align="start" style:justify-single-word="false"/>
      <style:text-properties style:font-name="Times New Roman" fo:font-size="14pt" fo:font-weight="bold" style:font-size-asian="14pt" style:font-weight-asian="bold" style:font-size-complex="14pt" style:font-weight-complex="bold"/>
    </style:style>
    <style:style style:name="P3" style:family="paragraph" style:parent-style-name="Standard">
      <style:paragraph-properties fo:line-height="150%" fo:text-align="center" style:justify-single-word="false"/>
      <style:text-properties style:font-name="Times New Roman" fo:font-size="14pt" fo:font-weight="bold" style:font-size-asian="14pt" style:font-weight-asian="bold" style:font-size-complex="14pt" style:font-weight-complex="bold"/>
    </style:style>
    <style:style style:name="P4" style:family="paragraph" style:parent-style-name="Standard">
      <style:paragraph-properties fo:line-height="150%"/>
      <style:text-properties style:font-name="Times New Roman" fo:font-size="14pt" style:font-size-asian="14pt" style:font-size-complex="14pt"/>
    </style:style>
    <style:style style:name="P5" style:family="paragraph" style:parent-style-name="Standard">
      <style:paragraph-properties fo:line-height="150%" fo:text-align="justify" style:justify-single-word="false"/>
      <style:text-properties style:font-name="Times New Roman" fo:font-size="14pt" style:font-size-asian="14pt" style:font-size-complex="14pt"/>
    </style:style>
    <style:style style:name="P6" style:family="paragraph" style:parent-style-name="Standard">
      <style:paragraph-properties fo:line-height="150%"/>
      <style:text-properties style:font-name="Times New Roman" fo:font-size="14pt" fo:language="ru" fo:country="RU" style:font-size-asian="14pt" style:font-size-complex="14pt"/>
    </style:style>
    <style:style style:name="P7" style:family="paragraph" style:parent-style-name="Standard">
      <style:paragraph-properties fo:line-height="150%" fo:text-align="justify" style:justify-single-word="false"/>
      <style:text-properties style:font-name="Times New Roman" fo:font-size="14pt" fo:language="ru" fo:country="RU" style:font-size-asian="14pt" style:font-size-complex="14pt"/>
    </style:style>
    <style:style style:name="P8" style:family="paragraph" style:parent-style-name="Standard">
      <style:paragraph-properties fo:line-height="150%" fo:text-align="center" style:justify-single-word="false"/>
      <style:text-properties style:font-name="Times New Roman" fo:font-size="14pt" fo:language="ru" fo:country="RU" style:font-size-asian="14pt" style:font-size-complex="14pt"/>
    </style:style>
    <style:style style:name="P9" style:family="paragraph" style:parent-style-name="Standard">
      <style:paragraph-properties fo:line-height="150%" fo:text-align="start" style:justify-single-word="false"/>
      <style:text-properties style:font-name="Times New Roman" fo:font-size="14pt" fo:language="ru" fo:country="RU" fo:font-weight="normal" style:font-size-asian="14pt" style:font-weight-asian="normal" style:font-size-complex="14pt" style:font-weight-complex="normal"/>
    </style:style>
    <style:style style:name="P10" style:family="paragraph" style:parent-style-name="Standard">
      <style:paragraph-properties fo:line-height="150%" fo:text-align="justify" style:justify-single-word="false"/>
      <style:text-properties style:font-name="Times New Roman" fo:font-size="14pt" fo:language="ru" fo:country="RU" fo:font-weight="normal" style:font-size-asian="14pt" style:font-weight-asian="normal" style:font-size-complex="14pt" style:font-weight-complex="normal"/>
    </style:style>
    <style:style style:name="P11" style:family="paragraph" style:parent-style-name="Standard">
      <style:paragraph-properties fo:line-height="150%" fo:text-align="justify" style:justify-single-word="false"/>
      <style:text-properties style:font-name="Times New Roman" fo:font-size="14pt" fo:language="ru" fo:country="RU" fo:font-style="italic" style:font-size-asian="14pt" style:font-style-asian="italic" style:font-size-complex="14pt" style:font-style-complex="italic"/>
    </style:style>
    <style:style style:name="P12" style:family="paragraph" style:parent-style-name="Standard">
      <style:paragraph-properties fo:line-height="150%" fo:text-align="justify" style:justify-single-word="false"/>
      <style:text-properties style:font-name="Times New Roman" fo:font-size="14pt" fo:language="ru" fo:country="RU" fo:font-style="italic" fo:font-weight="normal" style:font-size-asian="14pt" style:font-style-asian="italic" style:font-weight-asian="normal" style:font-size-complex="14pt" style:font-style-complex="italic" style:font-weight-complex="normal"/>
    </style:style>
    <style:style style:name="P13" style:family="paragraph" style:parent-style-name="Standard">
      <style:paragraph-properties fo:line-height="150%" fo:text-align="center" style:justify-single-word="false"/>
      <style:text-properties style:font-name="Times New Roman" fo:font-size="14pt" fo:language="ru" fo:country="RU" fo:font-weight="bold" style:font-size-asian="14pt" style:font-weight-asian="bold" style:font-size-complex="14pt" style:font-weight-complex="bold"/>
    </style:style>
    <style:style style:name="P14" style:family="paragraph" style:parent-style-name="Standard">
      <style:paragraph-properties fo:line-height="150%" fo:text-align="justify" style:justify-single-word="false"/>
      <style:text-properties style:font-name="Times New Roman" fo:font-size="14pt" fo:language="ru" fo:country="RU"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line-height="150%" fo:text-align="start" style:justify-single-word="false"/>
      <style:text-properties style:font-name="Times New Roman" fo:font-size="14pt" fo:language="ru" fo:country="RU"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line-height="100%" fo:text-align="justify" style:justify-single-word="false"/>
      <style:text-properties style:font-name="Times New Roman" fo:font-size="14pt" fo:language="ru" fo:country="RU"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line-height="150%" fo:text-align="start" style:justify-single-word="false"/>
      <style:text-properties style:font-name="Times New Roman" fo:font-size="14pt" fo:language="ru" fo:country="RU"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line-height="150%" fo:text-align="justify" style:justify-single-word="false"/>
      <style:text-properties style:font-name="Times New Roman" fo:font-size="14pt" fo:language="ru" fo:country="RU"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line-height="150%" fo:text-align="center" style:justify-single-word="false"/>
      <style:text-properties style:font-name="Times New Roman" fo:font-size="14pt" fo:language="ru" fo:country="RU"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line-height="150%" fo:text-align="justify" style:justify-single-word="false"/>
      <style:text-properties style:font-name="Times New Roman" fo:font-size="14pt" fo:language="en" fo:country="US" style:font-size-asian="14pt" style:font-size-complex="14pt"/>
    </style:style>
    <style:style style:name="P21" style:family="paragraph" style:parent-style-name="Standard">
      <style:paragraph-properties fo:line-height="150%"/>
      <style:text-properties style:font-name="Times New Roman" fo:font-size="14pt" fo:font-weight="normal" style:font-size-asian="14pt" style:font-weight-asian="normal" style:font-size-complex="14pt" style:font-weight-complex="normal"/>
    </style:style>
    <style:style style:name="P22" style:family="paragraph" style:parent-style-name="Standard">
      <style:paragraph-properties fo:line-height="150%" fo:text-align="justify" style:justify-single-word="false"/>
      <style:text-properties style:font-name="Times New Roman" fo:font-size="14pt" fo:font-weight="normal" style:font-size-asian="14pt" style:font-weight-asian="normal" style:font-size-complex="14pt" style:font-weight-complex="normal"/>
    </style:style>
    <style:style style:name="P23" style:family="paragraph" style:parent-style-name="Standard">
      <style:paragraph-properties fo:line-height="150%" fo:text-align="justify" style:justify-single-word="false"/>
      <style:text-properties style:font-name="Times New Roman" fo:font-size="12pt" fo:language="ru" fo:country="RU" fo:font-style="italic" style:font-size-asian="12pt" style:font-style-asian="italic" style:font-size-complex="12pt" style:font-style-complex="italic"/>
    </style:style>
    <style:style style:name="P24" style:family="paragraph" style:parent-style-name="Standard">
      <style:paragraph-properties fo:line-height="100%" fo:text-align="start" style:justify-single-word="false"/>
      <style:text-properties style:font-name="Times New Roman" fo:font-size="12pt" fo:language="ru" fo:country="RU" fo:font-style="italic" fo:font-weight="normal" style:font-size-asian="12pt" style:font-style-asian="italic" style:font-weight-asian="normal" style:font-size-complex="12pt" style:font-style-complex="italic" style:font-weight-complex="normal"/>
    </style:style>
    <style:style style:name="P25" style:family="paragraph" style:parent-style-name="Standard">
      <style:paragraph-properties fo:line-height="150%" fo:text-align="center" style:justify-single-word="false"/>
      <style:text-properties style:font-name="Times New Roman" fo:font-size="13pt" fo:font-weight="normal" style:font-size-asian="13pt" style:font-weight-asian="normal" style:font-size-complex="13pt" style:font-weight-complex="normal"/>
    </style:style>
    <style:style style:name="P26" style:family="paragraph" style:parent-style-name="Standard">
      <style:paragraph-properties fo:line-height="150%" fo:text-align="justify" style:justify-single-word="false"/>
      <style:text-properties style:font-name="Times New Roman" fo:font-size="13pt" fo:font-weight="normal" style:font-size-asian="13pt" style:font-weight-asian="normal" style:font-size-complex="13pt" style:font-weight-complex="normal"/>
    </style:style>
    <style:style style:name="P27" style:family="paragraph" style:parent-style-name="Standard">
      <style:paragraph-properties fo:line-height="150%" fo:text-align="start" style:justify-single-word="false"/>
      <style:text-properties style:font-name="Times New Roman" fo:font-size="13pt" fo:font-weight="normal" style:font-size-asian="13pt" style:font-weight-asian="normal" style:font-size-complex="13pt" style:font-weight-complex="normal"/>
    </style:style>
    <style:style style:name="P28" style:family="paragraph" style:parent-style-name="Standard">
      <style:paragraph-properties fo:line-height="150%" fo:text-align="center" style:justify-single-word="false"/>
      <style:text-properties style:font-name="Times New Roman" fo:font-size="13pt" fo:font-weight="bold" style:font-size-asian="13pt" style:font-weight-asian="bold" style:font-size-complex="13pt" style:font-weight-complex="bold"/>
    </style:style>
    <style:style style:name="P29" style:family="paragraph" style:parent-style-name="Standard">
      <style:paragraph-properties fo:line-height="150%" fo:text-align="start" style:justify-single-word="false"/>
      <style:text-properties style:font-name="Times New Roman" fo:font-size="13pt" fo:font-weight="bold" style:font-size-asian="13pt" style:font-weight-asian="bold" style:font-size-complex="13pt" style:font-weight-complex="bold"/>
    </style:style>
    <style:style style:name="P30" style:family="paragraph" style:parent-style-name="Standard">
      <style:paragraph-properties fo:line-height="150%" fo:text-align="start" style:justify-single-word="false"/>
      <style:text-properties style:font-name="Times New Roman" fo:font-size="13pt" fo:language="en" fo:country="none" fo:font-weight="normal" style:font-size-asian="13pt" style:font-weight-asian="normal" style:font-size-complex="13pt" style:font-weight-complex="normal"/>
    </style:style>
    <style:style style:name="P31" style:family="paragraph" style:parent-style-name="Standard">
      <style:paragraph-properties fo:line-height="150%" fo:text-align="justify" style:justify-single-word="false"/>
      <style:text-properties style:font-name="Times New Roman" fo:font-size="13pt" fo:language="en" fo:country="none" fo:font-weight="normal" style:font-size-asian="13pt" style:font-weight-asian="normal" style:font-size-complex="13pt" style:font-weight-complex="normal"/>
    </style:style>
    <style:style style:name="P32" style:family="paragraph" style:parent-style-name="Standard">
      <style:paragraph-properties fo:line-height="150%" fo:text-align="start" style:justify-single-word="false"/>
      <style:text-properties style:font-name="Times New Roman" fo:font-size="13pt" fo:language="en" fo:country="none" fo:font-weight="bold" style:font-size-asian="13pt" style:font-weight-asian="bold" style:font-size-complex="13pt" style:font-weight-complex="bold"/>
    </style:style>
    <style:style style:name="P33" style:family="paragraph" style:parent-style-name="Standard">
      <style:paragraph-properties fo:line-height="150%" fo:text-align="justify" style:justify-single-word="false"/>
      <style:text-properties style:font-name="Times New Roman" fo:font-size="13pt" style:text-underline-style="solid" style:text-underline-width="auto" style:text-underline-color="font-color" fo:font-weight="normal" style:font-size-asian="13pt" style:font-weight-asian="normal" style:font-size-complex="13pt" style:font-weight-complex="normal"/>
    </style:style>
    <style:style style:name="P34" style:family="paragraph" style:parent-style-name="Standard">
      <style:paragraph-properties fo:line-height="150%" fo:text-align="start" style:justify-single-word="false"/>
      <style:text-properties style:font-name="Times New Roman" fo:font-size="13pt" style:text-underline-style="solid" style:text-underline-width="auto" style:text-underline-color="font-color" fo:font-weight="normal" style:font-size-asian="13pt" style:font-weight-asian="normal" style:font-size-complex="13pt" style:font-weight-complex="normal"/>
    </style:style>
    <style:style style:name="P35" style:family="paragraph" style:parent-style-name="Standard">
      <style:paragraph-properties fo:line-height="100%" fo:text-align="justify" style:justify-single-word="false"/>
      <style:text-properties style:font-name="Times New Roman" fo:font-size="11pt" fo:language="ru" fo:country="RU" fo:font-style="normal" fo:font-weight="normal" style:font-size-asian="11pt" style:font-style-asian="normal" style:font-weight-asian="normal" style:font-size-complex="11pt" style:font-style-complex="normal" style:font-weight-complex="normal"/>
    </style:style>
    <style:style style:name="P36" style:family="paragraph" style:parent-style-name="Standard">
      <style:paragraph-properties fo:line-height="100%" fo:text-align="justify" style:justify-single-word="false"/>
      <style:text-properties style:font-name="Times New Roman" fo:font-size="11pt" fo:language="ru" fo:country="RU" fo:font-style="italic" fo:font-weight="normal" style:font-size-asian="11pt" style:font-style-asian="italic" style:font-weight-asian="normal" style:font-size-complex="11pt" style:font-style-complex="italic" style:font-weight-complex="normal"/>
    </style:style>
    <style:style style:name="P37" style:family="paragraph" style:parent-style-name="Standard">
      <style:paragraph-properties fo:line-height="100%" fo:text-align="start" style:justify-single-word="false"/>
      <style:text-properties style:font-name="Times New Roman" fo:font-size="11pt" fo:language="ru" fo:country="RU" fo:font-style="italic" fo:font-weight="normal" style:font-size-asian="11pt" style:font-style-asian="italic" style:font-weight-asian="normal" style:font-size-complex="11pt" style:font-style-complex="italic" style:font-weight-complex="normal"/>
    </style:style>
    <style:style style:name="P38" style:family="paragraph" style:parent-style-name="Standard">
      <style:paragraph-properties fo:line-height="150%" fo:text-align="center" style:justify-single-word="false" fo:break-before="page"/>
      <style:text-properties style:font-name="Times New Roman" fo:font-size="14pt" fo:font-weight="bold" style:font-size-asian="14pt" style:font-weight-asian="bold" style:font-size-complex="14pt" style:font-weight-complex="bold"/>
    </style:style>
    <style:style style:name="P39" style:family="paragraph" style:parent-style-name="Standard">
      <style:paragraph-properties fo:line-height="150%" fo:text-align="center" style:justify-single-word="false" fo:break-before="page"/>
      <style:text-properties style:font-name="Times New Roman" fo:font-size="14pt" fo:language="ru" fo:country="RU" fo:font-weight="bold" style:font-size-asian="14pt" style:font-weight-asian="bold" style:font-size-complex="14pt" style:font-weight-complex="bold"/>
    </style:style>
    <style:style style:name="P40" style:family="paragraph" style:parent-style-name="Standard">
      <style:paragraph-properties fo:line-height="150%" fo:text-align="justify" style:justify-single-word="false" fo:break-before="page"/>
      <style:text-properties style:font-name="Times New Roman" fo:font-size="14pt" fo:language="ru" fo:country="RU" style:font-size-asian="14pt" style:font-size-complex="14pt"/>
    </style:style>
    <style:style style:name="P41" style:family="paragraph" style:parent-style-name="Standard">
      <style:paragraph-properties fo:line-height="150%" fo:text-align="center" style:justify-single-word="false" fo:break-before="page"/>
      <style:text-properties style:font-name="Times New Roman" fo:font-size="14pt" fo:language="ru" fo:country="RU" style:font-size-asian="14pt" style:font-size-complex="14pt"/>
    </style:style>
    <style:style style:name="P42" style:family="paragraph" style:parent-style-name="Standard">
      <style:paragraph-properties fo:line-height="150%" fo:text-align="center" style:justify-single-word="false" fo:break-before="page"/>
      <style:text-properties style:font-name="Times New Roman" fo:font-size="14pt" fo:language="ru" fo:country="RU" fo:font-style="normal" fo:font-weight="bold" style:font-size-asian="14pt" style:font-style-asian="normal" style:font-weight-asian="bold" style:font-size-complex="14pt" style:font-style-complex="normal" style:font-weight-complex="bold"/>
    </style:style>
    <style:style style:name="P43" style:family="paragraph" style:parent-style-name="Standard">
      <style:paragraph-properties fo:line-height="150%" fo:text-align="center" style:justify-single-word="false" fo:break-before="page"/>
      <style:text-properties style:font-name="Times New Roman" fo:font-size="14pt" fo:language="en" fo:country="US" style:font-size-asian="14pt" style:font-size-complex="14pt"/>
    </style:style>
    <style:style style:name="P44" style:family="paragraph" style:parent-style-name="Standard">
      <style:paragraph-properties fo:line-height="150%" fo:text-align="justify" style:justify-single-word="false" fo:break-before="page"/>
      <style:text-properties style:font-name="Times New Roman" fo:font-size="14pt" fo:language="en" fo:country="US" style:font-size-asian="14pt" style:font-size-complex="14pt"/>
    </style:style>
    <style:style style:name="P45" style:family="paragraph" style:parent-style-name="Standard">
      <style:paragraph-properties fo:line-height="150%" fo:text-align="center" style:justify-single-word="false" fo:break-before="page"/>
      <style:text-properties style:font-name="Times New Roman" fo:font-size="14pt" fo:font-weight="normal" style:font-size-asian="14pt" style:font-weight-asian="normal" style:font-size-complex="14pt" style:font-weight-complex="normal"/>
    </style:style>
    <style:style style:name="P46" style:family="paragraph" style:parent-style-name="Standard" style:master-page-name="First_20_Page">
      <style:paragraph-properties fo:line-height="150%" fo:text-align="center" style:justify-single-word="false" style:page-number="auto"/>
      <style:text-properties style:font-name="Times New Roman" fo:font-size="13pt" fo:font-weight="normal" style:font-size-asian="13pt" style:font-weight-asian="normal" style:font-size-complex="13pt" style:font-weight-complex="normal"/>
    </style:style>
    <style:style style:name="P47" style:family="paragraph" style:parent-style-name="Standard">
      <style:paragraph-properties fo:line-height="150%" fo:text-align="start" style:justify-single-word="false" fo:break-before="page"/>
      <style:text-properties style:font-name="Times New Roman" fo:font-size="14pt" fo:font-weight="normal" style:font-size-asian="14pt" style:font-weight-asian="normal" style:font-size-complex="14pt" style:font-weight-complex="normal"/>
    </style:style>
    <style:style style:name="P48" style:family="paragraph" style:parent-style-name="Standard">
      <style:paragraph-properties fo:line-height="150%" fo:text-align="justify" style:justify-single-word="false"/>
      <style:text-properties style:font-name="Times New Roman" fo:font-size="14pt" fo:language="ru" fo:country="RU" fo:font-style="normal" fo:font-weight="normal" style:font-size-asian="14pt" style:font-style-asian="normal" style:font-weight-asian="normal" style:font-size-complex="14pt" style:font-style-complex="normal" style:font-weight-complex="normal"/>
    </style:style>
    <style:style style:name="P49" style:family="paragraph" style:parent-style-name="Standard">
      <style:paragraph-properties fo:line-height="150%" fo:text-align="justify" style:justify-single-word="false"/>
      <style:text-properties style:font-name="Times New Roman" fo:font-size="14pt" fo:language="ru" fo:country="RU" fo:font-style="italic" fo:font-weight="normal" style:font-size-asian="14pt" style:font-style-asian="italic" style:font-weight-asian="normal" style:font-size-complex="14pt" style:font-style-complex="italic"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 style:family="text">
      <style:text-properties fo:font-style="italic" style:text-underline-style="none" style:font-style-asian="italic" style:font-style-complex="italic"/>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style:font-style-asian="normal" style:font-style-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language="ru" fo:country="RU"/>
    </style:style>
    <style:style style:name="T15" style:family="text">
      <style:text-properties fo:language="ru" fo:country="RU" fo:font-style="normal" fo:font-weight="normal" style:font-style-asian="normal" style:font-weight-asian="normal" style:font-style-complex="normal" style:font-weight-complex="normal"/>
    </style:style>
    <style:style style:name="T16" style:family="text">
      <style:text-properties fo:language="ru" fo:country="RU" fo:font-weight="normal" style:font-weight-asian="normal" style:font-weight-complex="normal"/>
    </style:style>
    <style:style style:name="T17" style:family="text">
      <style:text-properties fo:language="en" fo:country="US"/>
    </style:style>
    <style:style style:name="T18" style:family="text">
      <style:text-properties fo:language="en" fo:country="US" fo:font-style="normal" style:text-underline-style="none" fo:font-weight="normal" style:font-style-asian="normal" style:font-weight-asian="normal" style:font-style-complex="normal" style:font-weight-complex="normal"/>
    </style:style>
    <style:style style:name="T19" style:family="text">
      <style:text-properties fo:language="en" fo:country="US" fo:font-style="normal" fo:font-weight="normal" style:font-style-asian="normal" style:font-weight-asian="normal" style:font-style-complex="normal" style:font-weight-complex="normal"/>
    </style:style>
    <style:style style:name="T20" style:family="text">
      <style:text-properties fo:language="en" fo:country="US" fo:font-style="italic" fo:font-weight="bold" style:font-style-asian="italic" style:font-weight-asian="bold" style:font-style-complex="italic" style:font-weight-complex="bold"/>
    </style:style>
    <style:style style:name="T21" style:family="text">
      <style:text-properties fo:language="en" fo:country="US" fo:font-style="italic" fo:font-weight="normal" style:font-style-asian="italic" style:font-weight-asian="normal" style:font-style-complex="italic" style:font-weight-complex="normal"/>
    </style:style>
    <style:style style:name="T22" style:family="text">
      <style:text-properties fo:language="en" fo:country="US"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ize="14pt" fo:font-style="normal" style:font-size-asian="14pt" style:font-style-asian="normal" style:font-size-complex="14pt" style:font-style-complex="normal"/>
    </style:style>
    <style:style style:name="T26" style:family="text">
      <style:text-properties fo:font-weight="normal" style:font-weight-asian="normal" style:font-weight-complex="normal"/>
    </style:style>
    <style:style style:name="T2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fo:font-weight="normal" style:font-weight-asian="normal" style:font-weight-complex="normal"/>
    </style:style>
    <style:style style:name="T30" style:family="text">
      <style:text-properties fo:language="en" fo:country="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FEDERAL STATE AUTONOMOUS</text:p>
      <text:p text:style-name="P25">EDUCATIONAL INSTITUTION</text:p>
      <text:p text:style-name="P25">HIGHER EDUCATION</text:p>
      <text:p text:style-name="P25">"NATIONAL RESEARCH UNIVERSITY</text:p>
      <text:p text:style-name="P25">HIGHER SCHOOL OF ECONOMICS</text:p>
      <text:p text:style-name="P25">Faculty of Informatics, Mathematics and Computer Science</text:p>
      <text:p text:style-name="P25"/>
      <text:p text:style-name="P28">Trenikhin Stanislav Georgievich</text:p>
      <text:p text:style-name="P25"/>
      <text:p text:style-name="P25">Final qualifying work – MASTER'S THESIS</text:p>
      <text:p text:style-name="P25">in the field of study <text:span text:style-name="T28">Artificial Intelligence and Computer Vision</text:span></text:p>
      <text:p text:style-name="P25"/>
      <text:p text:style-name="P28">"VISION-LANGUAGE-ACTION MODELS FOR ROBOTICS TASKS"</text:p>
      <text:p text:style-name="P28"/>
      <text:p text:style-name="P26"/>
      <table:table table:name="Table1" table:style-name="Table1">
        <table:table-column table:style-name="Table1.A"/>
        <table:table-column table:style-name="Table1.B"/>
        <table:table-row>
          <table:table-cell table:style-name="Table1.A1" office:value-type="string">
            <text:p text:style-name="P33">Reviewer</text:p>
            <text:p text:style-name="P30">Senior Research Engineer. Mathematical Robotics department, NTU Sirius – Sirius</text:p>
            <text:p text:style-name="P32">Maxim Grigorov</text:p>
          </table:table-cell>
          <table:table-cell table:style-name="Table1.A1" office:value-type="string">
            <text:p text:style-name="P34">Supervisor</text:p>
            <text:p text:style-name="P27">PhD/ Dr. of Science, Full </text:p>
            <text:p text:style-name="P27">Professor. Information Systems and </text:p>
            <text:p text:style-name="P27">Technologies Department, HSE </text:p>
            <text:p text:style-name="P27">University – Nizhny Novgorod</text:p>
            <text:p text:style-name="P29">Andrey Savchenko</text:p>
            <text:p text:style-name="P27"/>
            <text:p text:style-name="P34">Supervisor</text:p>
            <text:p text:style-name="P27">PhD,</text:p>
            <text:p text:style-name="P27">Associate Professor. Department of Data Analysis and Artificial Intelligence, HSE University – Moscow</text:p>
            <text:p text:style-name="P29">Ilya Makarov</text:p>
          </table:table-cell>
        </table:table-row>
      </table:table>
      <text:p text:style-name="P31"/>
      <text:p text:style-name="P31"/>
      <text:p text:style-name="P31"/>
      <text:p text:style-name="P31"/>
      <text:p text:style-name="P25">Nizhny Novgorod, 2026</text:p>
      <text:p text:style-name="P45">Содержание</text:p>
      <text:p text:style-name="P2"/>
      <text:p text:style-name="P22">Введение. …................................................................................................................ 4<text:line-break/></text:p>
      <text:p text:style-name="P5"><text:span text:style-name="T26">1. Теоретические основы Vision-Language-Action моделей. …........................... 5<text:line-break/></text:span><text:tab/><text:span text:style-name="T26">1.1. Эволюция систем управления в робототехнике. </text:span>…............................ 5<text:line-break/><text:tab/>1.1.1. Понятие мультимодальности: объединение зрения, языка, <text:line-break/><text:tab/>действия. .......................................................................................................... 8<text:line-break/><text:tab/>1.1.2. Обзор парадигмы VLA (Vision-Language-Action). …....................... 10<text:line-break/></text:p>
      <text:p text:style-name="P5"><text:span text:style-name="T26"><text:tab/>1.2. Архитектура модели SmolVLA. ........................................................ 12<text:line-break/><text:tab/>1.2.1. </text:span><text:span text:style-name="T16">Многоуровневая гибридная архитектура: межуровневые <text:tab/>трансформации и иерархия признаков. …..............................…............... 12<text:line-break/></text:span><text:span text:style-name="T14"><text:tab/>1.2.2. Синтез мультимодального контекста: интеграция <text:line-break/><text:tab/>проприоцепции и семантики в единое скрытое пространство............... 15<text:line-break/></text:span><text:span text:style-name="T16"><text:tab/>1.2.3. Специализированный Action-Expert и RTC: Flow Matching</text:span></text:p>
      <text:p text:style-name="P10"><text:s/><text:tab/>и высокочастотный синтез траекторий. …................................................. 16<text:line-break/><text:tab/>1.2.4. Стратегии преодоления перцептивных ограничений <text:line-break/><text:tab/>стандартных ViT-архитектур. ….................................................................. 18<text:line-break/></text:p>
      <text:p text:style-name="P5"><text:tab/><text:span text:style-name="T26">1.3. Обучение на основе демонстраций (Imitation Learning) …................ 19<text:line-break/><text:tab/>1.3.1. Алгоритмы имитационного обучения: ACT <text:line-break/><text:tab/>(Action Chunking</text:span> Transformer) и Diffusion Policy. ….................................. 19<text:line-break/><text:tab/>1.3.2. Проблема обобщения (Generalization) в открытом мире. …............ 21<text:line-break/><text:tab/>1.3.3. Особенности сбора датасетов для задач VLA. …............................ 24<text:line-break/></text:p>
      <text:p text:style-name="P47">2. Практическая реализация и эксперименты в среде LeRobot.</text:p>
      <text:p text:style-name="P5"><text:span text:style-name="T26"><text:tab/>2.1. Программная экосистема LeRobot. ….................................................. 26<text:line-break/></text:span><text:tab/>2.1.1. Обзор фреймворка LeRobot от Hugging Face. <text:span text:style-name="T26">….............................. 26<text:line-break/></text:span><text:tab/>2.1.2. Конфигурация рабочего окружения и интеграция SmolVLA. ….... 28<text:line-break/><text:tab/>2.1.3. Подготовка и нормализация данных (LeRobotDataset). ….............. 30<text:line-break/></text:p>
      <text:p text:style-name="P5"><text:span text:style-name="T26"><text:tab/>2.2. Постановка эксперимента. …................................................................ 33<text:line-break/></text:span><text:tab/>2.2.1. <text:span text:style-name="T15">Аппаратный стенд и конфигурация робота </text:span></text:p>
      <text:p text:style-name="P5"><text:span text:style-name="T15"><text:tab/>(Leader-Follower setup)</text:span>. ................................................................................. 35<text:line-break/><text:tab/>2.2.2. <text:span text:style-name="T15">Протокол сбора данных и методика записи демонстраций</text:span>. …....... 38<text:line-break/><text:tab/>2.2.3. Методология и программные регламенты дообучения. ….............. 40<text:line-break/></text:p>
      <text:p text:style-name="P5"><text:span text:style-name="T26"><text:tab/>2.3. Анализ результатов. …........................................................................... 44<text:line-break/></text:span><text:span text:style-name="T14"><text:tab/>2.3.1. Метрики успеха (Success Rate). …..................................................... 44<text:line-break/><text:tab/>2.3.2. Оценка устойчивости квантованной модели для встраиваемых процессоров с NPU. …............................................................................................ 46<text:line-break/></text:span></text:p>
      <text:p text:style-name="P5"><text:span text:style-name="T26">Заключение. …......................................................................................................... </text:span><text:span text:style-name="T16">48<text:line-break/></text:span></text:p>
      <text:p text:style-name="P21">References. …............................................................................................................ <text:span text:style-name="T14">50<text:line-break/></text:span></text:p>
      <text:p text:style-name="P4"/>
      <text:p text:style-name="P38">Введение.</text:p>
      <text:p text:style-name="P5"/>
      <text:p text:style-name="P7"><text:tab/>В современной робототехнике и системах искусственного интеллекта наблюдается фундаментальный сдвиг от классических изолированных систем управления к сквозным мультимодальным политикам класса Vision-Language-Action (VLA). Интеграция больших предобученных фундаментных моделей общего назначения позволяет роботизированным комплексам напрямую интерпретировать неструктурированные вербальные инструкции пользователя и данные сенсоров (открытый мир) в пространственно-временные траектории. Однако прямое натурное развертывание монолитных VLA-политик на автономных роботах сталкивается с критическим инфраструктурным барьером — вычислительным оверхедом и ограничением пропускной способности памяти встраиваемых устройств.</text:p>
      <text:p text:style-name="P7"><text:tab/>Вопросы имитационного обучения (Behavior Cloning) и создания мультимодальных ИИ-политик глубоко исследуются в работах open-source сообщества, включая исследовательские группы Hugging Face Robotics (экосистема LeRobot). Тем не менее, подавляющее большинство существующих подходов ориентировано на тяжелые серверные вычислительные кластеры.</text:p>
      <text:p text:style-name="P7"><text:tab/>Цель работы — исследование <text:span text:style-name="T17">VLA-</text:span>модели, путей повышения точности и устойчивости <text:s/>комплекса на базе малопараметрического трансформера SmolVLA (0.45B) и исполнительного робототехнического манипулятора в неструктурированной среде. Для достижения поставленной цели, необходимо развернуть фреймворк LeRobot, выполнить послойное исследование модели, верифицировать долю утилизации параметров, провести натурные испытания и зафиксировать полученные измерения, исследовать пути повышения точности и применения модели на встраиваемых устройствах.</text:p>
      <text:p text:style-name="P38"><text:tab/>1. Теоретические основы Vision-Language-Action моделей </text:p>
      <text:p text:style-name="P3"><text:tab/>1.1. Эволюция систем управления в робототехнике.</text:p>
      <text:p text:style-name="P7"/>
      <text:p text:style-name="P7"><text:tab/>Эволюция систем управления роботами прошла путь от жестко детерминированных математических моделей, до гибких нейросетевых архитектур. Начиная с перфокарт, впервые применённых в 1804 году французским изобретателем Жозефом Мари Жаккаром, создавшим ткацкий станок, идея используемых в современной промышленности станков с ЧПУ, формализовалась в 1952 году в виде первого работающего прототипа фрезерного станока “Cincinnati Milacron”. В последующем, появился особый язык управления движением, известный нам, как “G-code” (последовательность траекторий на заданной скорости), был закреплен как стандарт в 1960-х годах организацией EIA (Electronic Industries Alliance) под названием RS-274, а позже стал международным стандартом ISO 6983, в подавляющем большинстве, использующийся по сей день, от 3D-печати и фрезерной обработки с 5-DOF, до манипуляторов с 6-ю и более DOF.</text:p>
      <text:p text:style-name="P7"><text:tab/>Управление исполнительными механизмами базировалось на строгих математических расчетах. Процесс выполнения задачи разбивался на изолированные подзадачи: </text:p>
      <text:p text:style-name="P7"><text:tab/><text:span text:style-name="T3">Планирование траекторий</text:span> (генерация пути, свободного от столкновений с препятствиями.</text:p>
      <text:p text:style-name="P7"><text:tab/><text:span text:style-name="T3">Обратная кинематика</text:span> (расчет углов поворота каждого узла, для достижения заданной точки в пространстве.</text:p>
      <text:p text:style-name="P7"><text:tab/><text:span text:style-name="T3">Исполнение</text:span> контроллерами, рассчитанных движений на уровне шаговых и сервоприводов. </text:p>
      <text:p text:style-name="P7"><text:tab/>Такие системы эффективно работают только в строго структурированных условиях (например, на конвейере завода), и малейшее отклонение, т.е. сдвиг целевого объекта на пару микрон/миллиметров/сантиметров или изменение его формы, делает алгоритм неработоспособным, так как он не обладает <text:soft-page-break/>способностью к адаптации. </text:p>
      <text:p text:style-name="P7"><text:tab/> С развитием компьютерного зрения появилась архитектура “Sense-Plan-Act”. В этой системе, состоящей из отдельных независимых модулей:</text:p>
      <text:p text:style-name="P6"><text:span text:style-name="T5"><text:tab/></text:span><text:span text:style-name="T3">Зрение</text:span> (нейросеть) находит объект и определяет его 3D-координаты. </text:p>
      <text:p text:style-name="P6"><text:tab/><text:span text:style-name="T3">Планировщик</text:span> на основе этих координат рассчитывает путь.</text:p>
      <text:p text:style-name="P6"><text:tab/><text:span text:style-name="T3">Исполнитель</text:span> передает команды моторам.</text:p>
      <text:p text:style-name="P7"><text:tab/>Однако, если модуль зрения ошибся на несколько пикселей при определении глубины, все последующие расчеты становятся неверными (Error Propagation). Интеграция таких модулей требует сложной ручной настройки интерфейсов. </text:p>
      <text:p text:style-name="P7"><text:tab/>End-to-End Learning - современный подход, предлагающий отказаться от разделения на модули в пользу сквозного обучения. В этой парадигме единая нейросеть обучается напрямую отображать входные сенсорные данные (пиксели с камер) в выходные команды управления (токи или углы моторов). Поскольку модель видит результат своих действий в каждом кадре видеопотока, она может корректировать движение «на лету», даже если объект смещается. Использование архитектуры Vision-Language-Action, в рамках сквозного обучения, позволяет добавить в этот цикл еще и текстовый контекст, что превращает робота в универсального агента, способного интерпретировать сложные команды в непредсказуемой среде.</text:p>
      <text:p text:style-name="P7"><text:span text:style-name="T10"><text:tab/>В настоящем исследовании, переход к парадигме сквозного (end-to-end) управления рассматривается на примере физического манипулятора </text:span><text:span text:style-name="T6">SO-101</text:span><text:span text:style-name="T10">. Технологический стек работы базируется на экосистеме </text:span><text:span text:style-name="T6">Hugging Face LeRobot</text:span><text:span text:style-name="T10"> и мультимодальной VLA-модели </text:span><text:span text:style-name="T6">SmolVLA (0.45B)</text:span><text:span text:style-name="T10">. Визуальное восприятие системы обеспечивается парой камер: RGB-D </text:span><text:span text:style-name="T6">Intel RealSense D435i</text:span><text:span text:style-name="T10"> и RGB USB web-камерой. Устройство </text:span><text:span text:style-name="T6">Intel RealSense D435i</text:span><text:span text:style-name="T10">, помимо аппаратных средств построения карты глубины, оснащено инерциальным модулем (IMU), что расширяет возможности проприоцепции робота. В работе применяются специализированные утилиты стандартной библиотеки </text:span><text:span text:style-name="T6">pyrealsense2</text:span><text:span text:style-name="T10"> для </text:span><text:soft-page-break/><text:span text:style-name="T10">выполнения внутренней калибровки сенсора (intrinsic calibration), и препроцессинга «на железе». Экспериментальная часть исследования включает этап </text:span><text:span text:style-name="T18">Imitation</text:span><text:span text:style-name="T10"> </text:span><text:span text:style-name="T18">Learning</text:span><text:span text:style-name="T10">, </text:span><text:span text:style-name="T18">Sim-to-Real</text:span><text:span text:style-name="T10"> </text:span><text:span text:style-name="T18">Learning</text:span><text:span text:style-name="T10"> с использованием среды </text:span><text:span text:style-name="T6">LeIsaac (NVIDIA Isaac Sim)</text:span><text:span text:style-name="T10">, что позволяет минимизировать затраты на сбор натурных демонстраций и повысить обобщающую способность модели.</text:span></text:p>
      <text:p text:style-name="P39"><text:tab/>1.1.1. Понятие мультимодальности: объединение зрения, языка и действия. </text:p>
      <text:p text:style-name="P7"/>
      <text:p text:style-name="P7"><text:tab/>В контексте робототехники, мультимодальность — это способность системы управления обрабатывать и объединять данные разных типов (модальностей) в едином пространстве признаков. Для моделей класса VLA, таких как SmolVLA, ключевыми являются три составляющие: визуальная, текстовая и проприоцептивная (данные о состоянии самого робота). </text:p>
      <text:p text:style-name="P7"><text:tab/><text:span text:style-name="T3">Зрительная модальность (Vision)</text:span> является основным источником информации о внешней среде. В мультимодальных моделях визуальный энкодер <text:span text:style-name="T8">ViT</text:span> [1] / <text:span text:style-name="T8">SigLIP </text:span><text:span text:style-name="T13">[2] </text:span>не просто сегментирует объекты, а извлекает их семантические признаки, для понимания роботом не только геометрических координат объекта, но и его свойства. </text:p>
      <text:p text:style-name="P7"><text:tab/><text:span text:style-name="T3">Текстовая модальность (Language)</text:span> — высокоуровневое планирование. Интеграция языковых моделей, в данном случае речь идет о малых языковых моделях <text:span text:style-name="T20">Small</text:span><text:span text:style-name="T8">LM</text:span> [3], привносит в робототехнику «здравый смысл» (common sense reasoning). Текст служит связующим звеном между абстрактной задачей пользователя и конкретными действиями. Использование языка позволяет уйти от жестких команд типа move_to(x, y, z) к естественным инструкциям: «прибери со стола». Модель сама должна решить, что именно на столе является лишним, используя свои текстовые знания, накопленные в процессе предобучения на больших датасетах. </text:p>
      <text:p text:style-name="P7"><text:tab/><text:span text:style-name="T3">Модальность действия (Action)</text:span><text:span text:style-name="T11"> — проприоцепция и моторика. </text:span>Она включает в себя текущие углы поворота суставов (joint states) и предсказываемые траектории. В мультимодальном подходе действие рассматривается как еще один язык. Команды моторам токенизируются так же, как слова в предложении, что позволяет нейросети предсказывать следующее движение так же естественно, как следующее слово в тексте. </text:p>
      <text:p text:style-name="P7"><text:tab/>Истинная сила мультимодальности проявляется в их пересечении (The <text:soft-page-break/>VLA Fusion):</text:p>
      <text:p text:style-name="P7"><text:tab/><text:span text:style-name="T3">Vision + Language</text:span> позволяет роботу идентифицировать объекты по описанию («возьми стакан со стола»).</text:p>
      <text:p text:style-name="P7"><text:tab/><text:span text:style-name="T3">Language + Action</text:span> обеспечивает выполнение команд с учетом нюансов (команда «осторожно положи» меняет динамику движения по сравнению с «брось»).</text:p>
      <text:p text:style-name="P7"><text:tab/><text:span text:style-name="T3">Vision + Action</text:span> создает замкнутый цикл управления (closed-loop control), т.е. визуальные изменения в каждом последующем кадре, мгновенно корректируют траекторию механизма, в данной работе, манипулятора.</text:p>
      <text:p text:style-name="P7"><text:tab/>Кроме того, </text:p>
      <text:p text:style-name="P7"/>
      <text:p text:style-name="P39"><text:tab/>1.1.2. Обзор парадигмы VLA (Vision-Language-Action) </text:p>
      <text:p text:style-name="P7"/>
      <text:p text:style-name="P7"><text:tab/>Парадигма VLA (Зрение-Язык-Действие) представляет собой высшую точку конвергенции компьютерного зрения, обработки естественного языка и теории управления роботами. В отличие от классических систем, где каждая модальность обрабатывается изолированно, VLA-модели объединяют их в рамках единого вычислительного графа, переходя от дискретных команд к семантическому управлению. </text:p>
      <text:p text:style-name="P7"><text:tab/>Если традиционный G-code или API манипулятора требуют описания траектории в виде набора координат, то VLA-модели позволяют оперировать семантическими концепциями. Вместо программирования последовательности L1, L2, L3 для обхода препятствия, оператор подает команду «переставь стакан, не задев коробку». Модель, используя визуальные токены и знания из языкового ядра, самостоятельно синтезирует безопасную траекторию. </text:p>
      <text:p text:style-name="P7"><text:tab/><text:span text:style-name="T2">SmolVLA</text:span><text:span text:style-name="T12"> — </text:span><text:span text:style-name="T2">это модель предобученная на 23 000 эпизодах, около 500 датасетов сообщества</text:span><text:span text:style-name="T12"> [4]</text:span>. Модель не учится управлять «с нуля», она уже обладает знаниями о физике мира и свойствах объектов, полученными при предобучении. Для конкретного <text:span text:style-name="T2">SO-101</text:span> робота, требуется лишь процедура дообучения (fine-tuning), чтобы адаптировать общие знания к конкретной кинематике и сенсорике камеры, в настоящей работе, автор использует <text:span text:style-name="T2">RealSense D435i</text:span> от Intel. </text:p>
      <text:p text:style-name="P7"><text:tab/>В рамках данного исследования выделяются три критических преимущества VLA-парадигмы:</text:p>
      <text:p text:style-name="P7"><text:tab/><text:span text:style-name="T4">Обобщающая способность (Generalization)</text:span><text:span text:style-name="T10">:</text:span> Возможность работы с объектами и в условиях освещения, которые не встречались в обучающей выборке.</text:p>
      <text:p text:style-name="P7"><text:tab/><text:span text:style-name="T3">Устойчивость к шуму</text:span>: Благодаря сквозному обучению, система игнорирует визуальный «мусор», фокусируясь на семантически значимых признаках.</text:p>
      <text:p text:style-name="P7"><text:soft-page-break/><text:tab/><text:span text:style-name="T3">Интуитивность взаимодействия</text:span>: Управление роботом становится доступным пользователю без навыков программирования, через интерфейс естественного языка.</text:p>
      <text:p text:style-name="P7"><text:tab/>Следует особо отметить, эволюция систем управления привела к появлению VLA-моделей, которые преодолевают ограничения жестких алгоритмов прошлого. Использование компактной архитектуры <text:span text:style-name="T5">SmolVLA</text:span> в сочетании с экосистемой <text:span text:style-name="T5">LeRobot</text:span> и манипуляторами типа <text:span text:style-name="T2">SO-101</text:span>, открывают возможности для быстрого «холодного старта» разработки и развертывания доступных интеллектуальных робототехнических систем.</text:p>
      <text:p text:style-name="P38"><text:tab/>1.2. Архитектура модели SmolVLA </text:p>
      <text:p text:style-name="P8"><text:tab/><text:span text:style-name="T1">1.2.1. Многоуровневая гибридная архитектура: межуровневые трансформации и иерархия признаков. </text:span></text:p>
      <text:p text:style-name="P7"/>
      <text:p text:style-name="P7"><text:tab/>Основой зрительного восприятия является <text:span text:style-name="T2">ViT-B</text:span>. Изображение с камеры разбивается на патчи размером 16х16 <text:span text:style-name="T17">pixels</text:span>, которые проецируются в векторы размерностью 768. Positional embedding на 1024 токена позволяет модели сохранять пространственную структуру. Как и в классической реализации Vision Transformer, в исследуемой архитектуре применяется обучаемое позиционное кодирование (Learned Positional Embedding), соответствующие весовые коэффициенты присутствуют в структуре модели. Модель имеет характерные размер в 86 миллионов параметров и представляет собой энкодер из 12 слоев и 12 голов внимания. Применяемая модель <text:span text:style-name="T2">SigLIP</text:span> обучалась при использовании <text:span text:style-name="T17">Sigmoid</text:span>, в качестве функции нормализации логитов, в отличии от классического Softmax. </text:p>
      <text:p text:style-name="P7"><text:tab/>Языковой блок — <text:span text:style-name="T2">SmolLM2</text:span> на 252 миллиона параметров и состоит из обучаемого токенайзера, с размером словаря 49280 и скрытым пространством 960, и 16 слоев Grouped-Query Attention (GQA), существенно уменьшая вычислительную сложность.</text:p>
      <text:p text:style-name="P7"><text:tab/>Когнитивное мультимодальное ядро (<text:span text:style-name="T2">lm_expert</text:span>) состоит из 16 слоев GQA с размерностью 720, и выполняет роль центрального хаба, производя синтез трех информационных потоков. Текстовая команда формирует семантику задачи, совместно с языковыми данными, передаются визуальные признаки и признаки проприоцепции манипулятора. Таким образом, <text:span text:style-name="T17">Expert</text:span> обрабатывает единый унифицированный тензор, неразрывно связав NLP, <text:span text:style-name="T17">vision</text:span>, <text:span text:style-name="T17">proprioception</text:span>, игнорируя лингвистический шум и фокусируясь на физике. Внутреннее расширение слоев до 2048 позволяет вычислять сложные дуги и траектории движения манипулятора. </text:p>
      <text:p text:style-name="P7"><text:tab/>Темпоральный синтез действий (<text:span text:style-name="T17">Action</text:span> <text:span text:style-name="T17">Expert</text:span>) - финальный этап, <text:soft-page-break/>использующий <text:span text:style-name="T8">Flow Matching</text:span><text:span text:style-name="T13"> [5] и </text:span><text:span text:style-name="T8">Neural Ordinary Differential Equations</text:span><text:span text:style-name="T13"> [6]</text:span>, как ещё одну мощнейшую особенность архитектуры. Скрытые признаки, «ключи» и «значения» из VLM, поступают на вход Эксперта. Также, поступает ряд «action_time_mlp» размерностью 1440, включающий в себя «шум» положений (<text:span text:style-name="T2">torch.normal(mean=0.0, std=1.0 size=shape, dtype=torch.float32, device=device)</text:span>) 720 и синусно-косинусное временное встраивание 720, преобразуя векторы времени и шума в размерность 720. Поступивший шум, постепенно в цикле шаг за шагом, модель генерирует в динамический план (action chunk) в размерность 32, каждый шаг которого, исполняется физическим контроллером LeRobot, управляющим серво-моторами, от примерного направления, уточняясь на каждой итерации (по умолчанию, <text:span text:style-name="T2">num_steps = 10</text:span>). Каждый шаг модель обращается к памяти VLM (960) через Cross-Attention и уточняет вектор.</text:p>
      <text:p text:style-name="P7"><text:tab/>Т.о., выходные данные относительно тяжелой сети VLM, являющиеся векторным полем<text:span text:style-name="T13"> </text:span><text:span text:style-name="T19">Flow</text:span><text:span text:style-name="T13"> </text:span><text:span text:style-name="T19">Matching</text:span>, попадают в легковесный блок простых дифференциальных уравнений <text:span text:style-name="T8">RTC </text:span><text:span text:style-name="T9">(</text:span><text:span text:style-name="T21">Real-Time</text:span><text:span text:style-name="T9"> </text:span><text:span text:style-name="T21">Chunking</text:span><text:span text:style-name="T9">) </text:span><text:span text:style-name="T13">[7], пошагово и «бесшовно» генерируя плавные перемещения, пока нейросеть генерирует новое векторное поле.</text:span></text:p>
      <text:p text:style-name="P7"><text:tab/>Структурно, механизм все модели можно описать следующим образом:</text:p>
      <text:p text:style-name="P11"><text:tab/>ViT (768→960): извлечение признаков предметов, их формы и текстуры. </text:p>
      <text:p text:style-name="P11"><text:tab/>Language (960): канал получения внешних установок. </text:p>
      <text:p text:style-name="P11"><text:span text:style-name="T23"><text:tab/>State </text:span>(32→960): данные углов от сервоприводов. </text:p>
      <text:p text:style-name="P11"><text:tab/>VLM (960): формирует набор необходимых действий для решения задачи. </text:p>
      <text:p text:style-name="P11"><text:tab/>Action (720): высокочастотное вычисление плавной физической траектории.</text:p>
      <text:p text:style-name="P7"><text:tab/>Так, изучив архитектуру SmolVLA, и выяснив, что в качестве vision encoder, применена архитектура ViT/SigLIP, подразумевающая всего 3 стандартных канала RGB, делая <text:s/>невозможным передачу в модель RGB-D данных камеры Intel RealSense, в работе будут предприняты мероприятия, для <text:soft-page-break/>повышения точности пространственного позиционирования. Автор рассмотрит возможность использования бинокулярного зрения, путем передачи независимых потоков с левого и правого инфракрасных сенсоров камеры RealSense D435i, либо путем внесения изменений в саму архитектуру ViT, либо реализацией дополнительного адаптера. В таком случае, архитектура SmolVLA получит возможность извлекать признаки глубины, или глубины из параллакса, непосредственно в скрытом пространстве. Это позволит модели формировать более точную пространственную карту без привлечения вычислительно затратных алгоритмов.</text:p>
      <text:p text:style-name="P41"><text:tab/><text:span text:style-name="T1">1.2.2. Синтез мультимодального контекста: интеграция проприоцепции и семантики в единое скрытое пространство. </text:span></text:p>
      <text:p text:style-name="P7"/>
      <text:p text:style-name="P7"><text:tab/>Ключевой особенностью когнитивного ядра VLM, является способность оперировать данными разной физической природы в рамках единого математического представления. Процесс формирования мультимодального контекста реализуется через механизм межуровневого выравнивания и раннего слияния (Early Fusion). </text:p>
      <text:p text:style-name="P7"><text:tab/>VLM включает канал проприоцептивной адаптации (Self-Perception), позволяющий системе учитывать текущее состояние робота. Вектор текущих углов суставов робота (dim=32) поступает на вход проектора state_proj, линейный слой расширяет эти данные до размерности 960, делая их совместимыми со скрытым пространством языковой модели. Это «мышечное чувство» робота, без которого невозможно точно скорректировать движение. </text:p>
      <text:p text:style-name="P7"><text:tab/>После индивидуальной подготовки каждой модальности, ядро VLM получает на вход единый тензор, сформированный путем последовательной конкатенации визуального блока (1024 токена, dim=960), проприоцептивного (dim=960) и языкового блока (dim=960). Использование размерности 960 для всех потоков обеспечивает «бесшовность» внимания. </text:p>
      <text:p text:style-name="P7"><text:tab/>Механизм совместного внимания и логического вывод а реализован шестнадцатью слоями трансформера, производя взаимодействие токенов через механизм Self-Attention. В этом едином пространстве, текстовая инструкция выступает как фильтр, заставляющий модель фокусироваться на определенных «визуальных словах» (объектах), а данные проприоцепции соотносятся с визуальными координатами цели, позволяя модели вычислить разрыв (error signal) между текущим и требуемым положением. Синтез данных в едином скрытом пространстве размерностью 960 превращает разрозненные сенсорные потоки в целостную картину мира, позволяя системе управлять, основываясь не только на «зрении», но и на «ощущениях» в контексте поставленной задачи.</text:p>
      <text:p text:style-name="P41"><text:tab/><text:span text:style-name="T1">1.2.3. Специализированный Action-Expert и RTC: Flow Matching и высокочастотный синтез траекторий.</text:span></text:p>
      <text:p text:style-name="P7"/>
      <text:p text:style-name="P7"><text:tab/>В то время как когнитивное ядро (VLM Core) отвечает за глобальное планирование и понимание семантики команды, блок Action-Expert выполняет роль «мозжечка» системы. Его задача — высокоскоростная генерация плавных и физически корректных траекторий. </text:p>
      <text:p text:style-name="P7"><text:tab/>Скрытые признаки из VLM-ядра (dim=960) транслируются в пространство эксперта с размерностью 720. Такое «бутылочное горлышко» заставляет модель игнорировать избыточный лингвистический контекст и концентрироваться исключительно на пространственно-динамических характеристиках движения. Внутри каждого экспертного слоя реализовано расширение до 2048 признаков <text:span text:style-name="T3">up_proj</text:span>. Это обеспечивает достаточную математическую мощность для аппроксимации нелинейных зависимостей, возникающих при движении робота в 3D-пространстве. </text:p>
      <text:p text:style-name="P7"><text:tab/>Завершающим этапом работы архитектуры является преобразование высокоуровневых признаков эксперта в поток физических команд через специализированную голову действий (Action Head). Для обеспечения плавности движений используется блок <text:span text:style-name="T2">action_time_mlp</text:span> с входной размерностью 1440. Он объединяет признаки экспертного слоя (720) с временным эмбеддингом (720). Это позволяет модели реализовывать метод Flow Matching [5], предсказывая не статичную позицию, а динамическое изменение состояния (векторное поле скоростей). Вместо пошагового предсказания, модель генерирует предиктивный пакет (Action Chunking) в пространстве размерностью 32. Этот пакет содержит временной горизонт планирования, что позволяет физическому контроллеру, в данном случае LeRobot SO-101, сглаживать траекторию и компенсировать аппаратные задержки сервоприводов (применены Feetech SCS3215). Финальная проекция через <text:span text:style-name="T3">action_out_proj</text:span> переводит латентные признаки размерности 720 в <text:soft-page-break/>выходной вектор 32, который впоследствии интерпретируется как угловые координаты суставов и состояние гриппера манипулятора. </text:p>
      <text:p text:style-name="P7"><text:tab/>Разделение модели на тяжелое ядро (VLM) и легкого эксперта (Expert) позволяет реализовать асинхронное управление. Компактность экспертного блока (размерность 720) минимизирует задержку инференса (Inference Latency). Это критически важно для работы с камерой в замкнутом цикле (closed-loop), так как позволяет системе мгновенно вносить коррекцию в траекторию, при случайном смещении целевого объекта. </text:p>
      <text:p text:style-name="P7"><text:tab/>Таким образом, специализированный блок Action-Expert преобразует семантическое намерение, сформированное VLM-ядром, в прецизионный поток управляющих сигналов, а архитектура SmolVLA представляет собой синергию 12-слойного визуального энкодера, 16-слойного когнитивного ядра и 16-слойного специализированного эксперта, в сочетании с технологией Flow Matching позволяет SmolVLA преодолеть ограничения дискретного управления, обеспечивая механизму, в данном случае манипулятору SO-101, биологически подобную плавность и точность движений. Такая иерархическая структура позволяет эффективно распределять вычислительные ресурсы, обеспечивая глубокое понимание мультимодального контекста в сочетании с высокой частотой и точностью физического управления, что и подтверждается бенчмарками на github.com. Так, авторы работы <text:span text:style-name="T3">SmolVLA: A vision-language-action model for affordable and efficient robotics </text:span>, отмечают: </text:p>
      <text:p text:style-name="P11"><text:tab/>«In an effort to improve VLAs’ efficiency, TinyVLA (Wen et al., 2024) trained a lightweight sub-1B model from scratch on multimodal data and then fine-tuned it on robotics datasets,although the absence of large-scale pretraining on robotics data hinders wider generalization capabilities. SmolVLA shares similar goals with most of these efforts, aiming to develop and release open-source models that are both performant and highly efficient in terms of training and inference.» <text:span text:style-name="T12">[4]</text:span></text:p>
      <text:p text:style-name="P7"/>
      <text:p text:style-name="P41"><text:tab/><text:span text:style-name="T1">1.2.4. Стратегии преодоления перцептивных ограничений стандартных ViT-архитектур. </text:span></text:p>
      <text:p text:style-name="P7"><text:tab/>Несмотря на высокую семантическую плотность признаков, извлекаемых энкодером ViT-B/16, его стандартная трехканальная архитектура накладывает ограничения на прямое использование данных глубины (Depth) с Intel RealSense D435i. Для решения задачи прецизионного пространственного позиционирования манипулятора SO-101 в рамках данного исследования предполагаются следующие возможные архитектурные решения: </text:p>
      <text:p text:style-name="P7"><text:tab/><text:span text:style-name="T3">Бинокулярная агрегация (Stereo Fusion)</text:span>: Вместо использования программно вычисленной карты глубины, автор предлагает использовать «сырые» данные с левого и правого инфракрасных сенсоров. Это позволяет модели извлекать признаки стереопсиса (параллакса) непосредственно в скрытом пространстве. Технически это реализуется через подачу двух независимых визуальных потоков в общий мультимодальный контекст, где механизм Self-Attention в VLM-ядре вычисляет пространственные смещения объектов. </text:p>
      <text:p text:style-name="P7"><text:tab/><text:span text:style-name="T3">Архитектурная модификация входного каскада</text:span>: Рассматривается вариант расширения размерности первого сверточного слоя (patch_embedding) с 3 до 4 каналов (RGB-D). Это требует частичного дообучения (fine-tuning) визуального энкодера, но позволяет интегрировать геометрические данные на самом раннем этапе токенизации, что критично для захвата малоразмерных объектов. </text:p>
      <text:p text:style-name="P7"><text:tab/><text:span text:style-name="T3">Использование модальных адаптеров</text:span>: Реализация промежуточного звена (<text:span text:style-name="T17">Linear</text:span> или <text:span text:style-name="T17">Convolution</text:span> <text:span text:style-name="T17">Bottleneck</text:span> адаптера), которое преобразует данные глубины в 768-мерные «геометрические токены», конкатенируемые с визуальными токенами перед входом в основное ядро. </text:p>
      <text:p text:style-name="P7"><text:tab/>Предполагается, что нейросетевое извлечение признаков параллакса, в любом случае эффективнее, чем построение плотных облаков точек (Point Clouds) классическими алгоритмами, с другой стороны, использование карт глубины, рассчитанных аппаратными средствами RealSense — «бесплатны».</text:p>
      <text:p text:style-name="P38">1.3. Обучение на основе демонстраций (Imitation Learning)</text:p>
      <text:p text:style-name="P3">1.3.1. Алгоритмы имитационного обучения: ACT (Action Chunking Transformer) и Diffusion Policy.</text:p>
      <text:p text:style-name="P4"/>
      <text:p text:style-name="P7"><text:tab/>Современный сдвиг в обучении робототехнических систем по натурным демонстрациям (Behavior Cloning) связан с переходом от пошагового предсказания действий (Step-by-step Auto-regression) к пакетной генерации предиктивных траекторий (Action Chunking). Двумя наиболее репрезентативными архитектурными подходами в данном классе являются ACT и Diffusion Policy.</text:p>
      <text:p text:style-name="P7"><text:tab/>ACT (Action Chunking Transformer) [8] архитектура базируется на связке вариационного автокодировщика (Conditional VAE) [9] и классического трансформера [10]. На этапе инференса ACT принимает текущие визуальные наблюдения и вектор проприоцепции, формируя на выходе фиксированный временной пакет действий (chunk) на <text:span text:style-name="T8">T</text:span> шагов вперед. Использование латентной переменной C-VAE позволяет модели моделировать мультимодальные распределения (различные способы выполнения одной и той же задачи). Однако главным недостатком ACT является высокая чувствительность к качеству калибровки и эффект «замирания» (compounding error / execution lag): робот отрабатывает текущий пак действий, после чего контур замирает в ожидании тяжелого инференса следующего чанка, что приводит к дискретным, прерывистым движениям манипулятора. </text:p>
      <text:p text:style-name="P7"><text:tab/>В отличие от ACT, Diffusion Policy заменяет генератор на базе VAE процессом денойзинга (диффузии). Модель обучается аппроксимировать шумовые поля скоростей и за фиксированное количество шагов (например, от 100 до 16 шагов очистки) превращает случайный гауссов шум в плавную пространственно-временную дугу траектории. Диффузионный подход демонстрирует непревзойденную стабильность при обходе динамических препятствий и высокую точность позиционирования. Тем не менее, Diffusion <text:soft-page-break/>Policy накладывает колоссальные вычислительные требования (Compute-bound): выполнение многошагового цикла денойзинга нейросетью на каждом такте управления делает практически невозможным развертывание модели в реальном времени на встраиваемых Edge-платформах с лимитированной пропускной способностью памяти.</text:p>
      <text:p text:style-name="P7"><text:tab/>Ограничения ACT (дискретность паков) и Diffusion Policy (вычислительная избыточность денойзинга) продиктовали необходимость перехода к архитектурам Flow Matching, где нейросеть предсказывает векторное поле скоростей за один проход, а временное сглаживание выносится в детерминированные математические функции (RTC). В коде rtc.py библиотеки LeRobot, это реализовано:</text:p>
      <text:p text:style-name="P23"><text:s text:c="10"/>«v_t = original_denoise_step_partial(x_t) </text:p>
      <text:p text:style-name="P23"><text:s text:c="12"/>x_t.requires_grad_(True) </text:p>
      <text:p text:style-name="P23"><text:s text:c="12"/>x1_t = x_t - time * v_t </text:p>
      <text:p text:style-name="P23"><text:s text:c="12"/>err = (prev_chunk_left_over - x1_t) * weights </text:p>
      <text:p text:style-name="P23"><text:s text:c="12"/>grad_outputs = err.clone().detach() </text:p>
      <text:p text:style-name="P23"><text:s text:c="12"/>correction = torch.autograd.grad(x1_t, x_t, grad_outputs, retain_graph=False)[0]»<text:span text:style-name="T12"> </text:span><text:span text:style-name="T25">[11]</text:span></text:p>
      <text:p text:style-name="P7"/>
      <text:p text:style-name="P7"><text:tab/>Где, скрипт обращается к обученной нейросети, а модель выдает вектор скорости <text:span text:style-name="T8">v_t</text:span><text:span text:style-name="T13">. Контейнеру текущего состояния траектории x_t выставляется флаг отслеживания градиентов </text:span><text:span text:style-name="T9">(True)</text:span><text:span text:style-name="T13">, для расчета влияния тензора на итоговую ошибку. </text:span><text:span text:style-name="T27">x1_t = x_t - time * v_t —</text:span><text:span text:style-name="T13"> прямая дискретизация уравнения </text:span><text:span text:style-name="T9">dz_t = u_t dt</text:span><text:span text:style-name="T13">. Алгоритм делает виртуальный шаг вперед во времени. Он рассчитывает координату </text:span><text:span text:style-name="T9">x1_t</text:span><text:span text:style-name="T13"> — то есть место, где окажутся приводы робота на следующем микрошаге. </text:span></text:p>
      <text:p text:style-name="P7"><text:span text:style-name="T13"><text:tab/></text:span><text:span text:style-name="T9">prev_chunk_left_over</text:span><text:span text:style-name="T13"> — остаток старого плана движений, который робот начал выполнять мгновение назад, но еще не успел завершить. </text:span></text:p>
      <text:p text:style-name="P7"><text:span text:style-name="T13"><text:tab/></text:span><text:span text:style-name="T9">x1_t</text:span><text:span text:style-name="T13"> — это виртуальная точка нового плана. </text:span></text:p>
      <text:p text:style-name="P7"><text:span text:style-name="T13"><text:tab/></text:span><text:span text:style-name="T9">weights</text:span><text:span text:style-name="T13"> — маска внимания (временной фильтр), которая требует жесткого </text:span><text:soft-page-break/><text:span text:style-name="T13">совпадения траекторий в первые 5–10 шагов движения.</text:span></text:p>
      <text:p text:style-name="P7"><text:span text:style-name="T13"><text:tab/>Функция </text:span><text:span text:style-name="T9">torch.autograd.grad</text:span><text:span text:style-name="T13"> вычисляет частную производную (Якобиан) от прогнозируемой точки </text:span><text:span text:style-name="T9">x1_t</text:span><text:span text:style-name="T13"> по текущему состоянию </text:span><text:span text:style-name="T9">x_t</text:span><text:span text:style-name="T13">, взвешенную по зафиксированной ошибке </text:span><text:span text:style-name="T9">grad_outputs </text:span><text:span text:style-name="T13">по индексу </text:span><text:span text:style-name="T9">[0] </text:span><text:span text:style-name="T13">т. е., сам тензор градиента. Алгоритм вычисляет математический вектор силы, на какой точный угол и в какую сторону нужно повернуть каждый из сервоприводов, чтобы новая траектория плавно перетекла из старой, не потеряв при этом конечную цель.</text:span></text:p>
      <text:p text:style-name="P7"><text:tab/></text:p>
      <text:p text:style-name="P38">1.3.2. Проблема обобщения (Generalization) в открытом мире. </text:p>
      <text:p text:style-name="P7"/>
      <text:p text:style-name="P7"><text:tab/>Фундаментальным барьером при развертывании ИИ-систем на физических устройствах в неструктурированной среде является обеспечение способности обобщать перцептивно-моторные навыки на новые, не встречавшиеся в обучающем датасете конфигурации сцены. В рамках данного исследования задача формулируется как прецизионная манипуляция (захват <text:s/>и перенос объектов) в условиях вариативности внешней среды. В натурных экспериментах с манипулятором SO-ARM101 проблема обобщения декомпозируется на три независимых домена: </text:p>
      <text:p text:style-name="P7"><text:tab/>- Spatial Generalization: Инвариантность системы к смещению и ротации целевого объекта. Модель должна успешно генерировать траекторию наведения.</text:p>
      <text:p text:style-name="P7"><text:tab/>- Visual Generalization: Устойчивость перцептивного тракта к изменению условий освещенности рабочей зоны, а также к появлению фонового визуального шума (посторонних предметов).</text:p>
      <text:p text:style-name="P7"><text:tab/>- Semantic Generalization: Способность <text:s/>ядра SmolLM2 корректно интерпретировать синонимичные текстовые инструкции и ассоциировать их с конкретными признаками (цветом, формой) в визуальном пространстве токенов. </text:p>
      <text:p text:style-name="P7"><text:tab/>При использовании стандартных методов имитационного обучения (Behavior Cloning) система крайне чувствительна к феномену Covariate Shift. Малейшая погрешность позиционирования физического привода на первом шаге движения приводит к тому, что на следующем шаге веб-камера на гриппере фиксирует ракурс сцены, который отсутствовал в обучающей выборке record-test. В классических регрессионных архитектурах это вызывает лавинообразное накопление ошибки (compounding error): модель попадает в незнакомую область латентного пространства, генерирует аномальные управляющие сигналы и полностью срывает выполнение задачи.</text:p>
      <text:p text:style-name="P7"><text:soft-page-break/><text:tab/>В исследуемой системе, преодоление проблемы сдвига ковариат и обеспечение обобщения в открытом мире достигается за счет синергии двух факторов:</text:p>
      <text:p text:style-name="P7"><text:tab/>- Фундаментальное предобучение: Использование базовых весов HuggingFace <text:span text:style-name="T2">lerobot/smolvla_base</text:span><text:span text:style-name="T12"> [12]</text:span>, прошедших<text:span text:style-name="T2"> </text:span><text:span text:style-name="T12">обучение на 23 000 эпизодах, около 500 датасетов сообщества. </text:span>Модель изначально устойчива к изменению фона и ракурсов.</text:p>
      <text:p text:style-name="P7"><text:tab/>- Динамическая фильтрация через RTC: Математический алгоритм rtc.py через вычисление градиентов torch.autograd.grad непрерывно сглаживает <text:s/>задержки и удерживает физическую траекторию манипулятора в рамках непрерывного векторного поля Flow Matching, вычисленного нейросетью, аппаратно возвращая траекторию, при любых случайных внешних возмущениях. Т.о., вычисление Якобиана коррекции через оператор <text:span text:style-name="T2">torch.autograd.grad</text:span> на частоте в десятки Герц, обеспечивает динамическое возвращение траектории исполнительного органа в стабильное состояние, при любых обстоятельствах, гарантируя устойчивость пространственного поведения.</text:p>
      <text:p text:style-name="P40"><text:tab/><text:span text:style-name="T1">1.3.3. Особенности сбора датасетов для задач VLA. </text:span></text:p>
      <text:p text:style-name="P7"/>
      <text:p text:style-name="P7"><text:tab/>Сбор и структурирование натурных демонстраций для мультимодальных политик управления класса VLA, подчиняются жестким архитектурным критериям, отличным от классического компьютерного зрения. Модели на базе архитектуры Transformer обладают фундаментальной избыточностью и «data-hungry nature» из-за отсутствия априорных индуктивных смещений относительно геометрии физического мира. Для формирования устойчивых пространственно-семантических представлений любому трансформерному механизму внимания требуется сквозное предобучение на сверхкрупных гетерогенных массивах данных. Для преодоления этого барьера при сборке вновь создаваемых мультимодальных архитектур применяется методология композитного заимствования и Representation Transfer. Интеграция в перцептивно-когнитивный тракт SmolVLA весов предобученного визуального энкодера ViT/SigLIP (dim=768) и лингвистического ядра SmolLM2 (dim=960) (Llama-подобная топология) кратно упрощает и ускоряет процесс обучения новой модели. Заимствованные блоки уже обладают сформированной высокоуровневой семантикой, инвариантной к условиям сцены и синтаксису команд. Это позволяет полностью изолировать когнитивный базис от расчета градиентов (заморозить его). Локальный набор данных собирается узкоспециализированно и служит не для обучения модели базовым концепциям зрения или языка, а исключительно для точечной адаптации 16 слоев lm_expert, который одновременно функционирует как Language Model &amp; Flow Matching Model.</text:p>
      <text:p text:style-name="P7"><text:tab/>Внедрение нового стандарта LeRobotDataset v3 полностью перестраивает перцептивно-моторный конвейер, оптимизируя ввод-вывод (I/O) при регистрации и подготовке натурных данных. В отличие от ранних стандартов, где каждый демонстрационный эпизод записывался в изолированный файл, спецификация v3 использует сквозную конкатенацию. Множество эпизодов <text:soft-page-break/>непрерывно упаковываются в укрупненные файлы данных (Apache Parquet для сигналов и MP4 для видеорядов). Это радикально снижает нагрузку на файловую систему ОС и ускоряет работу батч-лоадеров PyTorch. Извлечение конкретных траекторий осуществляется через реляционные метаданные <text:span text:style-name="T2">meta/episodes/</text:span>, хранящие точные байтовые и фреймовые смещения. Благодаря внедрению класса StreamingLeRobotDataset, предобучение моделей может осуществляться в режиме реального времени напрямую из репозиториев Hugging Face Hub без необходимости предварительного скачивания и развертывания гигабайтных массивов на локальном диске хоста (Hub-native Streaming). Это позволяет моторному эксперту динамически потреблять распределенный кросс-робототехнический опыт «на лету», оптимизируя использование памяти. В стандарте v3 перцептивные трансформации (изменение яркости ColorJitter, контраста и резкости SharpnessJitter) полностью изолированы от сырого датасета. Кадры камеры фиксируются в исходном физическом виде, а маскирование и искажение пикселей для повышения устойчивости ViT-энкодера применяются исключительно в процессе тренировки, через конфигурацию <text:span text:style-name="T2">ImageTransformsConfig</text:span>. Это предотвращает артефакты повторного сжатия и позволяет многократно тестировать различные профили пространственного обобщения на одном наборе данных. Использование инкрементальной записи Parquet-таблиц с буферизацией, требует обязательного вызова метода <text:span text:style-name="T2">dataset.finalize()</text:span> по окончании сбора демонстраций. Без финализации структуры метаданных и футеров файлов Parquet, генерируемый локальный кэш (включая записанную сессию) признается поврежденным, что полностью блокирует его десериализацию в батч-лоадере.</text:p>
      <text:p text:style-name="P7"/>
      <text:p text:style-name="P39">2. Практическая реализация и эксперименты в среде LeRobot.</text:p>
      <text:p text:style-name="P3">2.1. Программная экосистема LeRobot </text:p>
      <text:p text:style-name="P13">2.1.1. Обзор фреймворка LeRobot от Hugging Face. </text:p>
      <text:p text:style-name="P9"/>
      <text:p text:style-name="P10"><text:tab/>В рамках разработки программно-аппаратного комплекса управления манипулятором SO-ARM101 в качестве базовой программной платформы был выбран open-source фреймворк LeRobot, развиваемый робототехническим подразделением компании Hugging Face, а также сообществом независимых исследователей. Назначение данной библиотеки — стандартизация, масштабирование и обеспечение полного цикла разработки систем сквозного имитационного обучения (End-to-End Imitation Learning) и мультимодального управления класса VLA в физическом мире. Архитектурная топология экосистемы LeRobot базируется на трех фундаментальных модулях, абстрагированных от конкретного аппаратного обеспечения: сбор данных, сборка политик (<text:span text:style-name="T17">policy</text:span> <text:span text:style-name="T17">building</text:span>), низкоуровневая работа с исполнительными механизмами.</text:p>
      <text:p text:style-name="P10"><text:tab/>Контур сбора данных и сериализации LeRobotDataset v3 предоставляет унифицированные механизмы высокоскоростной буферизации натурных демонстраций. Модуль захвата данных осуществляет асинхронный опрос сенсорных подсистем OpenCV для RGB-зрения, realsense2 для RGB-D и шины исполнительных механизмов манипулятора 1-Wire, CAN BUSes. Ключевой особенностью третьей версии формата является сквозная агрегация метаданных в Parquet-таблицы общего пула и декуплинг (вынос) тяжелых видеопотоков в MP4-бинарные чанки, что оптимизирует ввод-вывод (I/O) и исключает потерю кадров при телеуправлении. </text:p>
      <text:p text:style-name="P10"><text:tab/>Фреймворк полностью построен на принципах декларативного программирования с использованием менеджера конфигураций Hydra и синтаксического анализатора draccus. Фабрика моделей (make_policy) позволяет бесшовно переключаться между различными типами <text:soft-page-break/>робототехнических политик (ACT, Diffusion Policy, SmolVLA Pi0 и др.), инкапсулируя внутреннюю математику сетей от основного исполняемого скрипта. DataLoaders поддерживают технологию облачно-ориентированного стриминга StreamingLeRobotDataset, что позволяет смешивать локальный натурный опыт с большими удаленными датасетами предобучения «на лету» без перегрузки памяти. </text:p>
      <text:p text:style-name="P10"><text:tab/>- Аппаратный интерфейс низкого уровня (Hardware Abstraction Layer — HAL), встроенные драйверы и калибровочные CLI-утилиты (lerobot-calibrate) для прямой связи с сервоприводами общего назначения (шины Feetech и Dynamixel) через последовательный протокол UART/Serial. HAL-слой выполняет двустороннюю функцию: транслирует сырые тики энкодеров приводов в радианы проприоцептивного вектора состояний (dim=32), а также принимает предиктивные пакеты скоростей (Action Chunks) от выходного каскада Flow Matching (RTC), распределяя их на физические контроллеры моторов.</text:p>
      <text:p text:style-name="P10"><text:tab/>Использование фреймворка LeRobot позволяет отказаться от написания драйверов и модулей синхронизации потоков и сфокусировать внимание на исследовании архитектуры монолитного декодера SmolVLA, математического RTC-процессора и оптимизацию пайплайна и его частей. Однако, с другой стороны, исследуя механизмы подавляющего большинства <text:span text:style-name="T17">open-source</text:span> проектов, где каждый участник считает своим «святым долгом», «причинить проекту неизгладимые улучшения», из-за чего документация устаревает еще на этапе ее написания. В следствии чего, приходится решать множественные проблемы: крайняя недостаточность и противоречивость документации; экзистенциальное несоответствие структуры проекта, соответственно, и путей импорта модулей; конфликты версий драйверов и подключаемых библиотек. Отдельно стоит отметить работу парсера аргументов на основе draccus, консенсус с которым, далеко не всегда можно найти при помощи аргумента <text:span text:style-name="T2">--help</text:span> или ручной «<text:span text:style-name="T17">brute-force</text:span>». </text:p>
      <text:p text:style-name="P39">2.1.2. Конфигурация рабочего окружения и интеграция SmolVLA.</text:p>
      <text:p text:style-name="P10"/>
      <text:p text:style-name="P10"><text:tab/>Согласно официальному регламенту развертывания LeRobot, для управления зависимостями и обеспечения кроссплатформенной переносимости политик авторами фреймворка предписано использование изолированных сред Conda посредством дистрибьютора Miniforge. Данный шаг является критически важным для роботизированных систем, так как стандартные менеджеры пакетов типа pip venv не обеспечивают атомарности низкоуровневых C++ расширений. В рамках данного исследования автором был реализован рекомендованный пайплайн конфигурации хоста на базе ОС Ubuntu. </text:p>
      <text:p text:style-name="P10"><text:tab/>С помощью инструментария miniforge была развернута изолированная среда с жесткой фиксацией интерпретатора Python 3.12. Для предотвращения наложения системных путей Ubuntu, способных дестабилизировать линковку CUDA-ядер, автоматическая активация базового контекста Anaconda была принудительно заблокирована директивой <text:span text:style-name="T2">conda config --set auto_activate false</text:span>. </text:p>
      <text:p text:style-name="P10"><text:tab/>Для интеграции манипулятора SO-ARM101 и политики SmolVLA потребовалось проведение композитной сборки фреймворка из исходных кодов (From Source). На этапе сборки были активированы специализированные мета-пакеты зависимостей, жестко регламентированные мануалом: </text:p>
      <text:p text:style-name="P12"><text:tab/>clone https://github.com/huggingface/lerobot.git </text:p>
      <text:p text:style-name="P12"><text:tab/>cd lerobot </text:p>
      <text:p text:style-name="P12"><text:tab/>pip install -e ".[all]" [13]</text:p>
      <text:p text:style-name="P10"><text:tab/>По умолчанию архитектура LeRobot использует специализированную библиотеку TorchCodec для высокоскоростного бескопийного (Zero-copy) декодирования MP4-видеочанков напрямую в тензоры PyTorch. Мануал Hugging Face постулирует, что для корректного функционирования TorchCodec требуется жесткая синхронизация версий кодеков FFmpeg. Штатная пакетная установка conda install ffmpeg разворачивает новейшие экспериментальные версии (FFmpeg 8.X), которая вызывают терминальные коллизии с <text:soft-page-break/><text:span text:style-name="T2">torch_dtype_float4_e2m1fn_x2</text:span>, и падение процесса по OSError при работе со стабильным ядром PyTorch. Для ликвидации данной версионной коллизии, автором был применен задокументированный метод принудительного отката мультимедийного бэкенда до промышленного стандарта FFmpeg v7.1.1 через специализированный канал <text:span text:style-name="T2">conda install ffmpeg=7.1.1 -c conda-forge .</text:span></text:p>
      <text:p text:style-name="P42">2.1.3. Подготовка и нормализация данных (LeRobotDataset).</text:p>
      <text:p text:style-name="P14"/>
      <text:p text:style-name="P14"><text:tab/>В актуальной версии фреймворка LeRobot (v0.5.2), структура и логика предобработки натурных демонстраций полностью перестроены под стандарт LeRobotDataset v3.0. Ключевой архитектурный принцип новой спецификации — полное разделение физического хранения и пользовательского программного интерфейса (API). Это позволяет преобразовывать сырые сигналы манипулятора SO-ARM101 и потоки видеокамер в высокоуровневые нормализованные тензоры PyTorch с минимальной нагрузкой на вычислительные узлы.</text:p>
      <text:p text:style-name="P14"><text:tab/>В отличие от устаревших форматов, оперировавших изолированными файлами для каждого отдельного движения, реализована пакетная агрегация и реляционное File-based Storage индексирование. Низкоразмерные высокочастотные сигналы (углы в радианах, временные метки) непрерывно конкатенируются во времени и записываются в укрупненные файлы формата Apache Parquet (<text:span text:style-name="T2">data/</text:span>). Визуальные данные аналогично сшиваются в sharded-пакеты формата MP4 (<text:span text:style-name="T2">videos/)</text:span> .Извлечение конкретных временных окон для тренировки монолитной политики SmolVLA осуществляется не по границам файлов, а программно через слой реляционных метаданных (<text:span text:style-name="T2">meta/episodes/</text:span>), хранящий точные фреймовые и байтовые смещения (offsets). Данная оптимизация резко снижает давление на файловую систему ОС, гарантируя мгновенную инициализацию батч-лоадеров PyTorch.</text:p>
      <text:p text:style-name="P14"><text:tab/>Ввиду использования инкрементальной буферизированной записи в v3.0, по окончании записи сессии критически важным является выполнение метода <text:span text:style-name="T2">dataset.finalize()</text:span>. Данная функция принудительно сбрасывает накопленный в RAM кэш метаданных на диск, закрывает MP4-контейнеры и, главное, записывает индексные футеры (footers) Parquet-таблиц. Без финализации файлы признаются поврежденными, а встроенный движок pyarrow полностью блокирует их десериализацию на этапе развертывания вычислительного графа <text:soft-page-break/>обучения.</text:p>
      <text:p text:style-name="P14"><text:tab/>Перед подачей в когнитивное ядро все низкоразмерные признаки состояний (углов сервоприводов) проходят обязательное Z-score масштабирование. Статистические параметры сдвига и дисперсии не рассчитываются «на лету» (что вызвало бы простои GPU), а считываются из предвычисленного при финализации статического манифеста meta/stats.json. Фреймворк преобразует диапазоны радиан к единой дисперсии на основе глобальных средних и стандартных отклонений датасета, а пиксели видеопотоков нормализуются под весовые коэффициенты SigLIP.</text:p>
      <text:p text:style-name="P14"><text:tab/>Для обеспечения устойчивости и предотвращения сдвига ковариат в открытом мире, сбор демонстраций для задач выполнялся в строгом соответствии с официальным регламентом Hugging Face по качеству данных:</text:p>
      <text:p text:style-name="P14"><text:tab/>- Многоракурсность (Multi-view): Контур синхронизирован на частоте 15 FPS и включает два стандартизированных по номенклатуре канала: эгоцентрический observation.images.wrist (локальная коррекция) и аллоцентрический observation.images.front (глобальный ракурс на штативе).</text:p>
      <text:p text:style-name="P14"><text:tab/>- Визуальная чистота: Кадры зафиксированы при нейтральном стабильном освещении, а рука-лидер (so101_leader) умышленно вынесена за границы обзора, гарантируя, что единственными движущимися объектами в кадре являются рука-фолловер и целевые объекты.</text:p>
      <text:p text:style-name="P14"><text:tab/>- Семантическая плотность: Текстовые аннотации задач строго ограничены лаконичными детерминированными фразами без абстрактных индексов (длиной от 25 до 50 символов), что критично для корректной работы механизмов кросс-внимания лингво-моторного эксперта <text:span text:style-name="T2">lm_expert</text:span>. <text:tab/>Применяемая на этапе работы DataLoader конфигурация ImageTransformsConfig накладывает случайные перцептивные искажения (ColorJitter, SharpnessJitter) исключительно в оперативной памяти в процессе загрузки, сырой датасет на диске остается исходно-чистым, что исключает артефакты повторной компрессии видео и позволяет бесконечно <text:soft-page-break/>масштабировать профили пространственного обобщения модели.</text:p>
      <text:p text:style-name="P14"><text:tab/>Для общего случая записи датасета, автором используется вызов рекордера, со следующим набором аргументов:</text:p>
      <text:p text:style-name="P35">lerobot-record \ </text:p>
      <text:p text:style-name="P35"><text:s text:c="4"/>--robot.type=so101_follower \ # тип робота </text:p>
      <text:p text:style-name="P35"><text:s text:c="4"/>--robot.port=/dev/ttyACM0 \ # порт</text:p>
      <text:p text:style-name="P35"><text:s text:c="4"/>--robot.id=my_awesome_follower_arm \ # имя файла калибровки</text:p>
      <text:p text:style-name="P35"><text:s text:c="4"/>--robot.cameras="{ </text:p>
      <text:p text:style-name="P35"><text:s text:c="4"/>wrist: {type: opencv, index_or_path: 1, width: 640, height: 480, fps: 30, warmup_s: 5}, </text:p>
      <text:p text:style-name="P35"><text:s text:c="4"/>top: {type: intelrealsense, serial_number_or_name: 918512072179, width: 640, height: 480, fps: 30} }" \ </text:p>
      <text:p text:style-name="P35"><text:s text:c="4"/>--teleop.type=so101_leader \ </text:p>
      <text:p text:style-name="P35"><text:s text:c="4"/>--teleop.port=/dev/ttyUSB0 \ </text:p>
      <text:p text:style-name="P35"><text:s text:c="4"/>--teleop.id=my_awesome_leader_arm \ </text:p>
      <text:p text:style-name="P35"><text:s text:c="4"/>--display_data=true \ # открывает GUI с текущей телеметрией (графики углов и видеопоток)</text:p>
      <text:p text:style-name="P35"><text:s text:c="4"/>--dataset.repo_id=StasGT/record-test \ # репозиторий сохранения</text:p>
      <text:p text:style-name="P35"><text:s text:c="4"/>--dataset.push_to_hub=true \ # пуш на хаб</text:p>
      <text:p text:style-name="P35"><text:s text:c="4"/>--dataset.private=true \ # сделать датасет приватным</text:p>
      <text:p text:style-name="P35"><text:s text:c="4"/>--dataset.num_episodes=50 \ # общее количество эпизодов</text:p>
      <text:p text:style-name="P35"><text:s text:c="4"/>--dataset.episode_time_s=60 \ # максимальное время эпизода</text:p>
      <text:p text:style-name="P35"><text:s text:c="4"/>--dataset.reset_time_s=10 \ # время перезагрузки, для подготовки сцены к записи нового эпизода</text:p>
      <text:p text:style-name="P35"><text:s text:c="4"/>--dataset.single_task="<text:span text:style-name="T17">Instruction.</text:span>.." # Команда роботу (<text:span text:style-name="T17">language</text:span> <text:span text:style-name="T17">context</text:span>)</text:p>
      <text:p text:style-name="P14"/>
      <text:p text:style-name="P14"/>
      <text:p text:style-name="P42">2.2. Постановка эксперимента.<text:line-break/></text:p>
      <text:p text:style-name="P14"><text:tab/>В качестве референтной натурной задачи для верификации программно-аппаратного комплекса и монолитной VLA-политики SmolVLAPolicy была выбрана операция пространственно-селективного захвата и перемещения малоразмерного бытового объекта по текстовой инструкции. Семантическое содержание целевой команды формализовано в виде детерминированной строковой переменной: «<text:span text:style-name="T17">Put the boxes into the container</text:span>». Данная задача классифицируется в современной робототехнике как сложная перцептивно-моторная операция с cенсорной неопределенностью рабочей зоны в <text:s/>неструктурированной среде, без четкого физико-кинематического сценария выполнения.</text:p>
      <text:p text:style-name="P14"><text:tab/>Целевой объект располагается на плоской горизонтальной поверхности в зоне досягаемости манипулятора SO-ARM101, локальная сцена умышленно не изолируется от внешних возмущающих факторов. В полусферу обзора статической камеры (top) и эгоцентрического сенсора гриппера (wrist) вносятся элементы неструктурированного хаоса: случайные изменения интенсивности естественного освещения рабочей зоны, тени от конструкционных элементов робота, а также фоновый визуальный шум в виде нецелевых предметов схожей геометрии. Это исключает возможность применения примитивных пороговых алгоритмов сегментации по цвету (Color Thresholding) и требует от модели глубокого извлечения признаков.</text:p>
      <text:p text:style-name="P14"><text:tab/>Полный цикл манипуляционной задачи можно разделить на три фазы, генерируемые выходным каскадом Flow Matching в едином непрерывном потоке, как лингвистическое макро-наведение, <text:s/>визуальное сопровождение и терминальное исполнение.</text:p>
      <text:p text:style-name="P14"><text:tab/>Таким образом, робот считывает текстовый триггер и на основе глобальных признаков аллоцентрической (стационарной) камеры (top) осуществляет высокоскоростное перемещение манипулятора из базовой <text:soft-page-break/>домашней позиции в окрестность целевой зоны. По мере приближения к объекту, когда тело робота окклюзирует обзор для внешней камеры, управление полностью переключается на эгоцентрический канал wrist. Модель использует оптический поток для прецизионного центрирования оси захвата по нормали к продольной оси объекта, с последующей фиксацией достижения нулевой относительной скорости, раскрытие гриппера, смыкание сервопривода и последующий подъем объекта.</text:p>
      <text:p text:style-name="P14"><text:tab/>Математическим критерием успешности (Success Rate) выполнения задачи является способность сквозного конвейера сформировать непрерывное лингво-диффузионное поле скоростей dz_t = u_t dt и отработать его через RTC-процессор на частоте 40 Гц, обеспечив перемещение объекта манипулятором в 10 контрольных натурных тестах, в условиях неопределенности начального положения объекта.</text:p>
      <text:p text:style-name="P14"/>
      <text:p text:style-name="P42">2.2.2. Аппаратный стенд и конфигурация робота (Leader-Follower setup)</text:p>
      <text:p text:style-name="P14"/>
      <text:p text:style-name="P14"><text:tab/>Физический базис экспериментального комплекса организован по двухманипуляторной схеме «Ведущий — Ведомый», признанной наиболее эффективным методом высокоточного имитационного обучения . Стенд включает в себя два идентичных по кинематической структуре 5-осевых манипулятора семейства SO-ARM101, разработанных сообществом TheRobotStudio.</text:p>
      <text:p text:style-name="P14"><text:tab/>Манипулятор-Лидер (so101_leader) используется оператором в качестве физического интерфейса ввода (кинестетическое телеуправление). На данном устройстве принудительно отключен контур удержания крутящего момента. Оператор вручную перемещает звенья робота-лидера по целевой траектории задачи, а встроенные высокоточные магнитные энкодеры сервоприводов фиксируют угловые перемещения суставов в режиме реального времени. </text:p>
      <text:p text:style-name="P14"><text:tab/>Манипулятор-Фолловер (so101_follower) — исполнительный натурный орган, который на этапе записи зеркально дублирует движения лидера, а на этапе инференса — отрабатывает предиктивные пакеты действий (Action Chunks), генерируемые моделью SmolVLA.</text:p>
      <text:p text:style-name="P14"><text:tab/>Оба манипулятора оснащены специализированными программируемыми сервоприводами Feetech, соединенными по последовательной полудуплексной асинхронной шине передачи данных UART. Связь манипулятора-фолловера с управляющим узлом осуществляется через интерфейс USB-to-UART (микросхема FTDI/CH340), зарегистрированный в ОС Ubuntu, как устройство <text:span text:style-name="T2">/dev/ttyACM0</text:span>. Скорость обмена данными зафиксирована на уровне 1 000 000 бод (Baudrate), что минимизирует задержки при циклическом опросе регистров моторов. Манипулятор-лидер коммутируется независимым USB-Serial адаптером в порт <text:span text:style-name="T2">/dev/ttyUSB1</text:span> на аналогичной частоте шины. Аавтором была проведена процедура проприоцептивного выравнивания (Kinematic Alignment) средствами CLI-утилиты фреймворка, <text:span text:style-name="T2">lerobot-calibrate</text:span>. В ходе выполнения <text:soft-page-break/>пошагового юстировочного протокола были определены индивидуальные нулевые смещения (drive_offsets) и аппаратные лимиты вращения магнитных энкодеров для каждого из 6 суставов обоих плеч робота. Сгенерированные уникальные калибровочные профили автоматически экспортировались утилитой в локальный кэш среды (<text:span text:style-name="T2">~/.cache/huggingface/lerobot/calibration/</text:span>). На этапе сбора данных HAL-слой фреймворка подгружает эти таблицы, мгновенно выполняя линейное преобразование сырых цифровых тиков моторов в безразмерные нормализованные значения с плавающей запятой (normalized floats) в диапазоне [-1.0; 1.0]. Это гарантирует, что 32-мерный вектор состояния state отражает строго тождественное пространственное положение осей обоих манипулеров. Сенсорная подсистема, развернутая на стенде, жестко синхронизирована с утилитой записи на частоте 15 FPS и включает две камеры высокого разрешения (640x480 пикселей):</text:p>
      <text:p text:style-name="P14"><text:tab/>- Эгоцентрический канал (wrist): Монокулярная USB-веб-камера, интегрированная в класс OpenCVCamera, закрепленная на подвижном пластиковом фланце гриппера фолловера. </text:p>
      <text:p text:style-name="P14"><text:tab/>- Аллоцентрический канал (top): Статическая камера Intel RealSense 435i, установленная на независимом штативе в 40 см от рабочей зоны и обеспечивающая фронтальный обзор всей плоскости стола.</text:p>
      <text:p text:style-name="P14"><text:tab/>Необходимо подчеркнуть, в штатной архитектуре репозитория LeRobot функционал геометрической дедисторсии изображений полностью отсутствует, что обусловлено жесткой ориентацией авторов фреймворка на сквозные (end-to-end) методы обучения на базе raw-пикселей. </text:p>
      <text:p text:style-name="P14"><text:tab/>В Intel RealSense 435i процедура дедисторсии и пространственного выравнивания видеопотока осуществляется нативно на аппаратном уровне (Hardware-based Rectification) посредством интегрированного ASIC-процессора Intel RealSense Vision Processor D4. Чип считывает калибровочные параметры из встроенной EEPROM-памяти матрицы и выполняет потоковый ремаппинг пикселей непосредственно на кристалле устройства до отправки данных по <text:soft-page-break/>шине USB 3.0. Т.к. калибровка камеры производилась ранее, иных действий не требуется и в дополнительных решениях не нуждается.</text:p>
      <text:p text:style-name="P14"><text:tab/>Для адаптации системы под оптические искажения бюджетных USB-веб-камер, алгоритм cv2.remap был принудительно интегрирован автором непосредственно в метод <text:span text:style-name="T2">read()</text:span> класса <text:span text:style-name="T5">OpenCVCamera</text:span> (<text:span text:style-name="T2">/src/lerobot/cameras</text:span>). Чтобы исключить простои потока данных и минимизировать нагрузку на ядра процессора, вычисление матриц искажений вынесено из основного цикла и выполняется единожды через оператор cv2.initUndistortRectifyMap при инициализации сенсора. Высокоскоростной линейный ремаппинг на каждом шаге захвата обеспечивает подачу топологически корректных визуальных признаков на вход монолитного декодера SmolVLA, полностью компенсируя аппаратные ограничения сенсоров без изменения базового тренировочного цикла фреймворка. </text:p>
      <text:p text:style-name="P42">2.2.2. Протокол сбора данных и методика записи демонстраций .</text:p>
      <text:p text:style-name="P15"/>
      <text:p text:style-name="P14"><text:tab/>Экспериментальный этап формирования локального набора демонстраций для адаптации монолитного лингво-моторного эксперта lm_expert выполнялся в строго контролируемых условиях по регламентированному пошаговому протоколу. Целевая задача формулировалась как физический захват и перемещение объектов. Для инициализации сессии сбора данных автором использовалась глобальная CLI-утилита фреймворка со следующими атрибутами:</text:p>
      <text:p text:style-name="P16"/>
      <text:p text:style-name="P36">lerobot-record \ </text:p>
      <text:p text:style-name="P36"><text:s text:c="4"/>--robot.type=so101_follower \ </text:p>
      <text:p text:style-name="P36"><text:s text:c="4"/>--robot.port=/dev/ttyACM0 \ </text:p>
      <text:p text:style-name="P36"><text:s text:c="4"/>--robot.id=my_awesome_follower_arm \ </text:p>
      <text:p text:style-name="P36"><text:s text:c="4"/>--robot.cameras="{ </text:p>
      <text:p text:style-name="P36"><text:s text:c="4"/>wrist: {type: opencv, index_or_path: 1, width: 640, height: 480, fps: 30, warmup_s: 5}, </text:p>
      <text:p text:style-name="P36"><text:s text:c="4"/>top: {type: intelrealsense, serial_number_or_name: 918512072179, width: 640, height: 480, fps: 30, use_depth: True} }" \ </text:p>
      <text:p text:style-name="P36"><text:s text:c="4"/>--teleop.type=so101_leader \ </text:p>
      <text:p text:style-name="P36"><text:s text:c="4"/>--teleop.port=/dev/ttyUSB0 \ </text:p>
      <text:p text:style-name="P36"><text:s text:c="4"/>--teleop.id=my_awesome_leader_arm \ </text:p>
      <text:p text:style-name="P36"><text:s text:c="4"/>--display_data=true \ </text:p>
      <text:p text:style-name="P36"><text:s text:c="4"/>--dataset.repo_id=StasGT/record-put\ </text:p>
      <text:p text:style-name="P36"><text:s text:c="4"/>--dataset.push_to_hub=true \ </text:p>
      <text:p text:style-name="P36"><text:s text:c="4"/>--dataset.private=false \ </text:p>
      <text:p text:style-name="P36"><text:s text:c="4"/>--dataset.num_episodes=50 \ </text:p>
      <text:p text:style-name="P36"><text:s text:c="4"/>--dataset.episode_time_s=60 \ </text:p>
      <text:p text:style-name="P36"><text:s text:c="4"/>--dataset.reset_time_s=10 \ </text:p>
      <text:p text:style-name="P36"><text:s text:c="4"/>--dataset.single_task="Put the boxes into the container"</text:p>
      <text:p text:style-name="P14"/>
      <text:p text:style-name="P14"><text:tab/>Визуальные данные поступают с двух камер: USB-веб-камеры на гриппере манипулятора и Intel RealSense D435i для захвата RGB и depth. Возможность использования карт глубины не была реализована разработчиками проекта, и автором настоящей работы был модифицирован код проекта. В методе <text:span text:style-name="T2">get_observation()</text:span>, класса <text:span text:style-name="T2">SOFollower</text:span> дополнительно реализован запрос карты глубины, обработка, нормализация (raw-data имеет 12-битный формат) и добавление данных в конечный словарь наблюдений <text:span text:style-name="T2">obs_dict</text:span>, содержание которого — фреймы камер и состояния каждого <text:soft-page-break/>сервопривода. </text:p>
      <text:p text:style-name="P14"><text:tab/>Далее, были выполнены 50 демонстрационных эпизодов с максимальной длительностью каждого 60 секунд, и 10-ти секундной перезагрузкой среды выполнения. Фреймрейт не ограничивался и составлял 30 FPS для обоих ракурсов, потери фреймов и состояний приводов асинхронной шины UART (1Mbod) не обнаружены. Каждый эпизод включал в себя вариативные сценарии реализации задачи, необходимые для повышения обобщающей способности <text:s/>сети. Перед стартом каждого эпизода, объекты произвольно смещалась автором по плоскости стола в радиусе до 150 мм от центральной точки, имитируя неструктурированную среду. Задающий орган (so101_leader) плавно перемещался, направляя исполнительный манипулятор (so101_follower) из домашней позиции к объекту, умышленно варьируя скорость и кривизну макро-траектории для обогащения полей скоростей Flow Matching. Осуществлялось ювелирное наведение гриппера по нормали к продольной оси объекта, смыкание и подъем объекта. По завершении всех эпизодов, ядро фреймворка автоматически выполнило процедуру <text:span text:style-name="T2">dataset.finalize()</text:span>. Метод сформировал реляционные структуры метаданных в каталоге meta/episodes/, рассчитал постоянные коэффициенты сдвига и дисперсии признаков в манифесте meta/stats.json и, главное, записал индексные футеры <text:span text:style-name="T2">(footers)</text:span> таблиц Apache Parquet. Такой подход обеспечивает абсолютную целостность собранного набора данных и корректную пошаговую десериализацию лоадером PyTorch на этапе тренировки.</text:p>
      <text:p text:style-name="P42">2.2.3. Методология и программные регламенты дообучения.</text:p>
      <text:p text:style-name="P17"/>
      <text:p text:style-name="P18"><text:tab/><text:span text:style-name="T26">Дообучение проводилось, как путем сквозного дообучения лингво-моторного эксперта <text:s/></text:span><text:span text:style-name="T9">lm_expert </text:span><text:span text:style-name="T26">и адаптеров, так и методом низкоранговой адаптации </text:span><text:span text:style-name="T9">LoRA</text:span><text:span text:style-name="T26"> инструментария </text:span><text:span text:style-name="T9">peft</text:span><text:span text:style-name="T26">. На основе проведенного натурного вычислительного эксперимента на хосте с графическим ускорителем NVIDIA RTX 2060 Super (8Gb), 64Gb DDR-5, 16-core Intel Core i7-13700KF, используя стандартный CLI, был сформирован и верифицирован следующий профиль гиперпараметров:</text:span></text:p>
      <text:p text:style-name="P35"/>
      <text:p text:style-name="P24">lerobot-train \ </text:p>
      <text:p text:style-name="P24"><text:s/>--policy.type=smolvla \ </text:p>
      <text:p text:style-name="P24"><text:s/>--policy.pretrained_path=lerobot/smolvla_base \ </text:p>
      <text:p text:style-name="P24"><text:s/>--dataset.repo_id=StasGT/record-put \ </text:p>
      <text:p text:style-name="P24"><text:s/>--dataset.root=/home/stas/.cache/huggingface/lerobot/StasGT/record-put_20260505_171305 \ </text:p>
      <text:p text:style-name="P24"><text:s/>--policy.repo_id=StasGT/SmolVLA-Instruct_put <text:s/>\ </text:p>
      <text:p text:style-name="P24"><text:s/>--output_dir=outputs/train/SmolVLA-Instruct_ put \ </text:p>
      <text:p text:style-name="P24"><text:s/>--job_name=SmolVLA-Instruct_ put \ </text:p>
      <text:p text:style-name="P24"><text:s/>--policy.device=cuda \ </text:p>
      <text:p text:style-name="P24"><text:s/>--policy.optimizer_lr=1e-4 \ </text:p>
      <text:p text:style-name="P24"><text:s/>--policy.scheduler_decay_lr=1e-5 \ </text:p>
      <text:p text:style-name="P24"><text:s/>--steps=10000 \ </text:p>
      <text:p text:style-name="P24"><text:s/>--save_checkpoint=true \ </text:p>
      <text:p text:style-name="P24"><text:s/>--save_freq=500 \ </text:p>
      <text:p text:style-name="P37"><text:s/>--batch_size=24 \</text:p>
      <text:p text:style-name="P35"/>
      <text:p text:style-name="P14"><text:tab/>Математическая формализация и численные значения гиперпараметров процесса дообучения политики SmolVLA определены автором экспериментально в рамках ограничений целевого вычислительного узла.</text:p>
      <text:p text:style-name="P18"><text:span text:style-name="T26"><text:tab/>Масштабирование батча до 24 элементов позволило полностью загрузить регистры тензорных ядер архитектуры Turing, обеспечив эффективное сглаживание стохастического шума градиентов. Выбор значения, кратного внутренней топологии вычислений, перевел задачу в класс Compute-bound процессов, стабилизировав утилизацию видеопамяти на безопасной отметке в 7,0 ГБ VRAM. Объем итерационного профиля зафиксирован на уровне 10 000 шагов. При достигнутом темпе вычислений в 3.2 секунды на один шаг, </text:span><text:soft-page-break/><text:span text:style-name="T26">суммарная затрата времени на один полный цикл обучения, составила 8.5 часов, что позволило успешно уложить тренировку VLA-политики в рамки одного ночного цикла. За указанный период монолитное лингво-моторное ядро эксперта обработало 10 000 * 24 = 240 000 уникальных мультимодальных состояний манипулятора SO-ARM101, обеспечив глубокую сходимость целевой функции. </text:span></text:p>
      <text:p text:style-name="P18"><text:span text:style-name="T26"><text:tab/>На основе проведенного автором программного аудита градиентного поля в активной памяти PyTorch, шаг оптимизации был зафиксирован на умеренном, сбалансированном уровне </text:span><text:span text:style-name="T9">--policy.optimizer_lr=1e-4</text:span><text:span text:style-name="T26">, расположенном на границе между экстремально агрессивными 1e-3 и консервативными 1e-5 стратегиями градиентного спуска. Данный компромисс научно обоснован выявленной топологией распределения параметров политики по умолчанию, в рамках которой в режиме обучения находятся 16% от совокупной параметрической емкости графа (72 414 032) из (450 000 000) параметров. Изоляция от расчета градиентов базовых перцептивных блоков ViT/SigLIP (</text:span><text:span text:style-name="T9">freeze_vision_encoder=True</text:span><text:span text:style-name="T26">) и слоев самовнимания SmolLM2 гарантирует, что вся высокоуровневая семантика зрения, текстового контекста и внимания остается неизменной на протяжении всех 10 000 итераций. Оптимизации подвергаются исключительно межмодальные интерфейсные мосты (</text:span><text:span text:style-name="T9">model.state_proj</text:span><text:span text:style-name="T26">) и внутренние проекторы MLP-компонентов каждого из 16 уровней лингво-моторного блока </text:span><text:span text:style-name="T9">lm_expert (gate_proj, up_proj, down_proj)</text:span><text:span text:style-name="T26">. При при таком шаге, градиентный спуск AdamW осуществляет направленное высокоточное масштабирование и перевзвешивание данных когнитивных связей.</text:span></text:p>
      <text:p text:style-name="P18"><text:span text:style-name="T26"><text:tab/>В рамках данного исследования, как упоминалось ранее, в качестве фундаментального научно-практического новшества, в перцептивный тракт политики SmolVLA вводится дополнительный модальный канал восприятия — метрические карты глубины (Depth Maps). Внедрение пространственного признака третьего измерения потребовало внесения локальных, математически </text:span><text:soft-page-break/><text:span text:style-name="T26">изолированных архитектурных изменений в вычислительный граф модели. В раннем исследовании автора [14] была предпринята попытка глубокой структурной деконструкции: замена базового энкодера ViT мультимодальной модели BLIP на гетерогенную архитектуру энкодер-декодер DeTr [15]. Указанный маневр, несмотря на локальный прирост вычислительной производительности на 46%, привел к терминальному коллапсу и полной потере семантики лингвистического блока [14]. Модель демонстрировала классический эффект переобучения: успешно аппроксимировала <text:s/>исключительно в рамках обучающей выборки, но полностью теряла способность к семантическому обобщению на валидационных тестах, т.к. ничтожно малый объем локального набора данных не позволял трансформеру заново выучить синтаксис мира. Учитывая выявленные ранее закономерности [14], в настоящей работе автором реализован метод асимметричного кросс-модального наведения без нарушения инвариантности базовых распределений. В контур токенизации префиксов на стыке замороженного энкодера ViT/SigLIP и 16 слоев лингво-моторного планировщика SmolLM был интегрирован разработанный автором кастомный блок перекрестного внимания (Cross-Attention Bridge). Математический граф алгоритма проецирует высокосемантические запросы (Q) токенов RGB-зрения на обучаемые матрицы ключей (K) и значений (V) геометрических токенов расстояния, сформированных параллельной легковесной CNN глубины. Данный подход позволил обогатить префикс признаками третьего измерения, не вызывая деградации когнитивных функций исходной сети. В ходе проведения серии натурных вычислительных экспериментов в среде фреймворка LeRobot, автором были получены и верифицированы три сравнительных профиля дообучения политики: </text:span></text:p>
      <text:p text:style-name="P18"><text:span text:style-name="T26"><text:tab/>- Профиль базовой адаптации (</text:span>Конфигурация по умолчанию<text:span text:style-name="T26">): Реализует селективный Full Parameter Tuning исключительно внутри MLP-компонентов эксперта lm_expert при жесткой заморозке 83.91% сети. </text:span><text:soft-page-break/><text:span text:style-name="T26">Программный аудит зафиксировал оптимизацию строго 16.09% активных весов (72 414 032 параметра), что обеспечило удержание пиковой памяти на отметке 7,0 ГБ VRAM на пакете данных batch_size = 24 при стабильном темпе вычислений 3.2 секунды на итерацию. </text:span></text:p>
      <text:p text:style-name="P18"><text:span text:style-name="T26"><text:tab/>- Профиль низкоранговой перцептивной адаптации (</text:span>LoRA-ViT<text:span text:style-name="T26">): Включение LoRA-адаптеров малого ранга (r=8) в слои внимания энкодера ViT/SigLIP. Контур обеспечил локальное выравнивание визуальных признаков под новые условия, однако спровоцировал увеличение латентности шага оптимизации на 18% из-за накладных расходов на расчет дельт обратного прохода градиентов. </text:span></text:p>
      <text:p text:style-name="P18"><text:span text:style-name="T26"><text:tab/>- Профиль расширенной перцепции (</text:span>RGB-D-<text:span text:style-name="T17">Extended</text:span><text:span text:style-name="T26">)[16], [17]: Конфигурация с активированным кастомным Cross-Attention мостом на входе лингвомоторного блока. Восстановление и удержание канонической скрытой размерности на уровне 960 признаков реализуется нативно на уровне линейной алгебры самого блока перекрестного внимания — за счет проецирования векторов </text:span><text:span text:style-name="T9">Query (Q)</text:span><text:span text:style-name="T26"> из исходного 960-мерного пространства SigLIP на матрицы </text:span><text:span text:style-name="T9">Key (K)</text:span><text:span text:style-name="T26"> и </text:span><text:span text:style-name="T9">Value (V)</text:span><text:span text:style-name="T26"> карты глубины. Дообучение MLP-слоев проекторов эксперта продемонстрировало монотонную сходимость функции потерь, нативно обучив модель closed-loop с учетом физического расстояния до объекта в миллиметрах при полном сохранении накопленного лингвистического интеллекта фундаментной сети.</text:span></text:p>
      <text:p text:style-name="P38">2.3. Анализ результатов </text:p>
      <text:p text:style-name="P19">2.3.1. Метрики успеха (Success Rate). </text:p>
      <text:p text:style-name="P14"/>
      <text:p text:style-name="P18"><text:span text:style-name="T26"><text:tab/>Для количественной оценки эффективности разработанных архитектурных решений и проведения верификации обученной политики SmolVLAPolicy, в качестве ключевой интегральной метрики был выбран коэффициент успешности выполнения задачи Success Rate (SR). Данный параметр определяется, как отношение количества успешных натурных манипуляций к общему числу совершенных экспериментальных попыток:<text:line-break/></text:span>SR = N_success / N_total * 100%</text:p>
      <text:p text:style-name="P18"><text:span text:style-name="T26"><text:tab/>Экспериментальная проверка проводилась в условиях неструктурированной среды для целевой команды "</text:span><text:span text:style-name="T9">Put the boxes into the container</text:span><text:span text:style-name="T26">". Для каждого из трех сгенерированных профилей дообучения (штатный RGB-пайплайн, LoRA-ViT и разработанный RGB-D Cross-Attention контур) была проведена серия из 10 изолированных тестовых запусков. Перед каждым единичным стартом целевой объект (коробка) случайным образом смещался по плоскости стола в диапазоне до 15 см относительно центральной демонстрационной точки, а также разворачивался на произвольный угол.<text:line-break/><text:tab/>Манипуляционный цикл признавался абсолютно успешным (N_success) только при выполнении всей задачи, состоящей из подзадач наведения гриппера, захвата, перемещения и размещения обекта в указанном пространстве. </text:span></text:p>
      <text:p text:style-name="P18"><text:span text:style-name="T26"><text:tab/>В ходе проведения испытаний было экспериментально зафиксировано критическое влияние математического контура Real-Time Chunking (RTC) на результирующий показатель SR. При отключении скрипта rtc.py инференс модели падал из-за задержек, что приводило к дискретным рывкам приводов и падению метрики SR до уровня 20–30% из-за токовых ударов и пространственного разлета осей. Интеграция RTC-процессора, вычисляющего градиенты коррекции torch.autograd.grad на частоте 40 Гц, позволила бесшовно </text:span><text:soft-page-break/><text:span text:style-name="T26">сшивать предиктивные пакеты скоростей (Action Chunks), гарантируя непрерывность движения. </text:span></text:p>
      <text:p text:style-name="P18"><text:span text:style-name="T26"><text:tab/></text:span><text:span text:style-name="T29">RGB-base</text:span><text:span text:style-name="T24"> профиль </text:span><text:span text:style-name="T26">(дообучение 16.09% весов) продемонстрировал </text:span>SR = 70%<text:span text:style-name="T26"> (7 из 10 успешных захватов). Ошибки были вызваны флуктуациями теней, искажавшими оценку дальности по плоской картинке. </text:span></text:p>
      <text:p text:style-name="P18"><text:span text:style-name="T26"><text:tab/></text:span><text:span text:style-name="T29">LoRA-ViT</text:span><text:span text:style-name="T26"> профиль показал деградацию метрики до </text:span>SR = 60%<text:span text:style-name="T26"> вероятно, вследствие частичной потери семантики и локального переобучения, или вследствии статистической погрешности. Автор полагает уместным считать данный метод бесперспективным. </text:span></text:p>
      <text:p text:style-name="P18"><text:span text:style-name="T26"><text:tab/></text:span><text:span text:style-name="T29">RGB-D-Extended</text:span><text:span text:style-name="T26"> </text:span><text:span text:style-name="T9">(RGB(Q), Depth(K, V) → Cross-Attention)</text:span><text:span text:style-name="T26"> расширенная архитектура продемонстрировала наивысшую робастность, зафиксировав </text:span>SR = 90%<text:span text:style-name="T26"> (9 из 10 успешных манипуляций). Асимметричное наведение токенов SigLIP на матрицы ключей и значений карты глубины Intel RealSense D435i полностью ликвидировало геометрическую неопределенность сцены, обеспечив прецизионное closed-loop позиционирования исполнительного органа манипулятора во всем рабочем пространстве.</text:span></text:p>
      <text:p text:style-name="P18"><text:span text:style-name="T26"><text:tab/>В данном исследовании не приводятся данные испытаний базовой предобученной модели </text:span><text:span text:style-name="T9">lerobot/smolvla_base </text:span><text:span text:style-name="T26">[12], т. к. дают нулевой результат, вне зависимости от команды управления, сервоприводы робота устремляются в положение равное «0», т. е. каждый сустав оказывается в своем среднем положении, а гриппер в положении «сомкнут». Данный математический феномен хорошо известен в глубоком обучении и теории вероятностей, как <text:s/></text:span><text:span text:style-name="T9">Regression to the Mean</text:span><text:span text:style-name="T26"> при оптимизации по MSE [18], а в робототехнике и имитационном обучении (Behavior Cloning) он часто манифестирует как </text:span><text:span text:style-name="T9">The Blurring Problem / Mean Prediction Effect</text:span><text:span text:style-name="T26"> [19]. Иными словами, в условиях высокой энтропии признаков, некоррелированные векторы целевых положений приводов, симметрично распределенные в нормализованном пространстве [-1.0; 1.0], принудительно аппроксимируются сетью к своему математическому ожиданию, равному нулю mean = 0.</text:span></text:p>
      <text:p text:style-name="P42">2.3.2. Оценка устойчивости квантованной модели для встраиваемых процессоров с NPU.</text:p>
      <text:p text:style-name="P14"/>
      <text:p text:style-name="P14"><text:tab/>Выбор периферийного устройства с NPU производился из того, что имелось в наличии у автора. Самым подходящим устройством оказался микрокомпьютер Orange Pi AI Pro <text:span text:style-name="T17">(HUAWEI Ascend quad-core</text:span> 64-bit <text:span text:style-name="T17">ARM</text:span> <text:span text:style-name="T17">CPU (</text:span>GPU + <text:span text:style-name="T17">NPU </text:span>8 TOPS/<text:span text:style-name="T17">Int8 (DaVinci </text:span>AI processor<text:span text:style-name="T17">),</text:span> 16GB LPDDR4X). <text:s/>Перенос скомпилированного графа политики SmolVLAPolicy из высокопроизводительного контекста хоста на периферийный встраиваемый вычислитель сопряжен с барьером жесткого ограничения пропускной способности памяти LPDDR4X и вычислительной мощности 4-ядерного процессора ARM64. Для обеспечения инференса трансформерных сетей в режиме реального времени на частоте сбора данных, обязательным этапом является аппаратная компиляция графа и его целочисленное квантование (Post-Training Quantization).</text:p>
      <text:p text:style-name="P18"><text:span text:style-name="T26"><text:tab/>Поскольку целевой нейропроцессорный модуль (NPU) платы базируется на архитектуре Huawei Ascend, промежуточный граф ONNX, экспортированный с жесткой фиксацией входных масок (Static Shapes), транслировался утилитой </text:span><text:span text:style-name="T9">Ascend Tensor Compiler</text:span><text:span text:style-name="T26"> в финальный аппаратно-зависимый бинарный файл формата </text:span><text:span text:style-name="T9">.om</text:span><text:span text:style-name="T26">. В процессе компиляции была реализована процедура целочисленного квантования до уровня INT8 <text:s/>послойно для всех весовых матриц. Квантованию подверглись как вся модель SmolVLM, так и разработанный автором мост </text:span><text:span text:style-name="T7">RGB-D-Extended</text:span><text:span text:style-name="T26">. Для минимизации ошибки квантования и предотвращения рассогласования шкал активаций использовался калибровочный датасет состоящий из 30 репрезентативных мультимодальных префиксов. Экспериментальный анализ инференса квантованного .om-графа на Orange Pi AI Pro выявил высокую устойчивость предложенной автором архитектуры к снижению разрядности весов.</text:span></text:p>
      <text:p text:style-name="P18"><text:span text:style-name="T26"><text:tab/>Из-за высокой избыточности 16 слоев эксперта, просадка точности </text:span><text:soft-page-break/><text:span text:style-name="T26">аппроксимации векторов скоростей Flow Matching составила не более 2.3% по сравнению с базовым float32 графом на GPU хоста. Целочисленное сжатие </text:span><text:span text:style-name="T22">450</text:span><text:span text:style-name="T26"> млн параметров модифицированного контура до уровня INT8 привело к 4-кратному сокращению объема занимаемой оперативной памяти (410 </text:span><text:span text:style-name="T22">Mb</text:span><text:span text:style-name="T26">) и радикально снизило нагрузку на шину LPDDR4X. Пиковая частота инференса всей VLA-политики непосредственно на NPU-чипе стабилизировалась на отметке 6.4 Гц (время генерации одного Action Chunk составляет 15</text:span><text:span text:style-name="T22">0</text:span><text:span text:style-name="T26"> мс). <text:tab/>Несмотря на отставание частоты инференса нейросети на NPU от частоты физического контура опроса сервоприводов Feetech (40 Гц), устойчивость управления была полностью компенсирована алгоритмом Real-Time Chunking на уровне CPU, обеспечивающего прецизионное closed-loop сглаживание фазовых сдвигов, и стыковку траекторий на первых шагах нового предсказания движения манипулятора. Это полностью демпфировало аппаратный лаг NPU и обеспечило удержание итоговой метрики успешности на уровне </text:span>SR = 90%<text:span text:style-name="T26">, доказав высокую устойчивость и применимость квантованного комплекса.</text:span></text:p>
      <text:p text:style-name="P42">Заключение.</text:p>
      <text:p text:style-name="P14"/>
      <text:p text:style-name="P18"><text:span text:style-name="T26"><text:tab/>В рамках проведенного исследования был экспериментально верифицирован </text:span><text:span text:style-name="T22">end-to-end</text:span><text:span text:style-name="T26"> программно-аппаратный комплекс мультимодального управления класса VLA на базе малопараметрической фундаментной архитектуры SmolVLA (0.45B), интегрированный с исполнительным 5-осевым манипулятором SO-ARM101. Исследуемая малопараметрическая архитектура SmolVLA открывает колоссальные технологические перспективы для деплоя на борту автономных мобильных роботов.</text:span></text:p>
      <text:p text:style-name="P14"><text:tab/>Параметрическая емкость в 450 млн параметров позволяет развернуть модель непосредственно на устройствах сверхмалого класса (Orange Pi AI Pro, Jetson Orin Nano), полностью исключая API Latency и гарантируя отказоустойчивость робота вне зависимости от связи.</text:p>
      <text:p text:style-name="P18"><text:span text:style-name="T26"><text:tab/>Благодаря наследованию предобученных моделей </text:span><text:span text:style-name="T29">SigLIP</text:span><text:span text:style-name="T26"> и </text:span><text:span text:style-name="T29">SmolLM2</text:span><text:span text:style-name="T26">, мобильный робот обретает способность гибко интерпретировать текстовые инструкции пользователя в неструктурированной складской или бытовой среде, на лету выполняя обобщение признаков предметов </text:span><text:span text:style-name="T29">без необходимости их жесткого переобучения</text:span><text:span text:style-name="T26">. Потребление квантованного в I</text:span><text:span text:style-name="T22">NT</text:span><text:span text:style-name="T26">8 графа на встраиваемой плате составляет менее 15 Вт. Это является критическим фактором, так как минимизирует энергозатраты бортовых аккумуляторов, продлевая время автономной работы.</text:span></text:p>
      <text:p text:style-name="P14"><text:tab/>Несмотря на достигнутый показатель успешности натурного испытания (SR = 90), глубокий технический аудит выявил ряд фундаментальных ограничений текущей реализации:</text:p>
      <text:p text:style-name="P18"><text:span text:style-name="T26"><text:tab/>Пиковая частота инференса нейросети на NPU платы Orange Pi AI Pro зафиксирована на отметке около 6.5 Гц. Данное ограничение вызвано «узким горлышком» шины памяти LPDDR4X при авторегрессионном чтении весов слоев трансформера. Частота 6.5 Гц является критически недостаточной для </text:span><text:soft-page-break/><text:span text:style-name="T26">высокодинамических AMR (например, шагающих роботов), требующих частоты обновления управляющего сигнала не менее 100 Гц. Хотя математический процессор Real-Time Chunking успешно сглаживает фазовые сдвиги, при резком изменении среды, модель не успеет мгновенно скорректировать поведение и робот продолжит отрабатывать старый Action Chunk, вычисленный до момента изменения сцены.</text:span></text:p>
      <text:p text:style-name="P14"><text:tab/>Для преодоления выявленных ограничений, в дальнейших научно-исследовательских работах планируется реализация следующих инженерных решений:</text:p>
      <text:p text:style-name="P18"><text:span text:style-name="T26"><text:tab/></text:span><text:span text:style-name="T22">- </text:span><text:span text:style-name="T26">Разделение модели на под-модели с распараллеливанием вычислений.</text:span></text:p>
      <text:p text:style-name="P18"><text:span text:style-name="T26"><text:tab/>- Замена S</text:span><text:span text:style-name="T22">igLIP </text:span><text:span text:style-name="T26">на эффективный гибридный энкодер </text:span><text:span text:style-name="T22">CNN+Attention.</text:span></text:p>
      <text:p text:style-name="P14"><text:tab/>- Внедрение модели семантического разделения команды на действия.</text:p>
      <text:p text:style-name="P14"><text:tab/>- Внедрение спекулятивного декодирования действий.</text:p>
      <text:p text:style-name="P18"><text:span text:style-name="T26"><text:tab/>- Внедрение <text:s/>Mixture of Experts (</text:span><text:span text:style-name="T22">MoE</text:span><text:span text:style-name="T26">)</text:span><text:span text:style-name="T22">.</text:span></text:p>
      <text:p text:style-name="P18"><text:span text:style-name="T26"><text:tab/></text:span><text:span text:style-name="T22">- </text:span><text:span text:style-name="T26">Динамическое квантование.</text:span></text:p>
      <text:p text:style-name="P43">References</text:p>
      <text:p text:style-name="P7"/>
      <text:p text:style-name="P20"><text:tab/>1. Dosovitskiy A., Beyer L., Kolesnikov A. et al. An Image is Worth 16x16 Words: Transformers for Image Recognition at Scale //arXiv:2010.11929 – 2020.</text:p>
      <text:p text:style-name="P20"><text:tab/>2. Zhai X., Mustafa B., Kolesnikov A. et al. Sigmoid Loss for Language Image Pre-Training //arXiv:2303.15343 – 2023.</text:p>
      <text:p text:style-name="P20"><text:tab/>3. Loubna B. et al. SmolLM2: When Smol Goes Big – Data-Centric Training of a Small Language Model //arXiv:2502.02737 – 2025.</text:p>
      <text:p text:style-name="P20"><text:tab/>4. Shukor M., Aubakirova D. et al. SmolVLA: A vision-language-action model for affordable and efficient robotics //arXiv:2506.01844 – 2025.</text:p>
      <text:p text:style-name="P20"><text:tab/>5. Lipman Y., Chen R. et al. Flow matching for generative modeling //arXiv:2210.02747 – 2022.</text:p>
      <text:p text:style-name="P20"><text:tab/>6. Chen R., Rubanova Y. et al. Neural Ordinary Differential Equations //arXiv:1806.07366 – 2019.</text:p>
      <text:p text:style-name="P20"><text:tab/>7. Black K., Galliker M., Levine S. Real-Time Execution of Action Chunking Flow Policies //arXiv:2506.07339 – 2025.</text:p>
      <text:p text:style-name="P20"><text:tab/>8. Zhao T., Kumar V, Levine S., Finn C. Learning Fine-Grained Bimanual Manipulation with Low-Cost Hardware //arXiv:2304.13705 – 2023.</text:p>
      <text:p text:style-name="P20"><text:tab/>9. Kingma D., Welling M. Auto-Encoding Variational Bayes //arXiv:1312.6114 – 2013.</text:p>
      <text:p text:style-name="P20"><text:tab/>10. Vaswani A., Shazeer N. Attention Is All You Need //arXiv:1706.03762 – 2017.</text:p>
      <text:p text:style-name="P20"><text:tab/>11. LeRobot //GitHub repository, 2025. URL: <text:a xlink:type="simple" xlink:href="https://github.com/huggingface/lerobot" text:style-name="Internet_20_link" text:visited-style-name="Visited_20_Internet_20_Link">https://github.com/huggingface/lerobot</text:a></text:p>
      <text:p text:style-name="P20"><text:tab/>12. SmolVLA_base (LeRobot) weights //Hugging Face repository, 2025. URL: <text:a xlink:type="simple" xlink:href="https://huggingface.co/lerobot/smolvla_base" text:style-name="Internet_20_link" text:visited-style-name="Visited_20_Internet_20_Link">https://huggingface.co/lerobot/smolvla_base</text:a></text:p>
      <text:p text:style-name="P20"><text:tab/>13. Hugging Face LeRobot Docs // URL: <text:a xlink:type="simple" xlink:href="https://huggingface.co/docs/lerobot" text:style-name="Internet_20_link" text:visited-style-name="Visited_20_Internet_20_Link">https://huggingface.co/docs/lerobot</text:a></text:p>
      <text:p text:style-name="P20"/>
      <text:p text:style-name="P44"><text:tab/>14. Trenikhin S. <text:span text:style-name="T30">Research of the transformer architectures and fine-tuning in the task of generating text descriptions //Report at the HSE University in Nizhny Novgorod – 2025.</text:span></text:p>
      <text:p text:style-name="P20"><text:tab/>15. Carion N., Massa F., Kirillov A. et al. End-to-End Object Detection with Transformers //arXiv:2005.12872 – 2020.</text:p>
      <text:p text:style-name="P20"><text:tab/>16. <text:s/>SmolVLA-RGB-D-Extended //GitHub repository, 2026. URL: <text:a xlink:type="simple" xlink:href="https://github.com/StasGT/SmolVLA-RGB-D-Extended" text:style-name="Internet_20_link" text:visited-style-name="Visited_20_Internet_20_Link">https://github.com/StasGT/SmolVLA-RGB-D-Extended</text:a>.</text:p>
      <text:p text:style-name="P20"><text:tab/>17. SmolVLA-RGB-D-Extended weights //Hugging Face repository, 2026. URL: <text:a xlink:type="simple" xlink:href="https://huggingface.co/StasGT/SmolVLA-RGB-D-Extended" text:style-name="Internet_20_link" text:visited-style-name="Visited_20_Internet_20_Link">https://huggingface.co/StasGT/SmolVLA-RGB-D-Extended</text:a>.</text:p>
      <text:p text:style-name="P20"><text:tab/>18. Bishop C. M. Pattern Recognition and Machine Learning. – Springer, 2006.</text:p>
      <text:p text:style-name="P20"><text:tab/>19. Chi C. et al. Diffusion Policy: Visuomotor Policy Learning via Action Diffusion // Proceedings of the Topic Robotics: Science and Systems (RSS). – 2023.</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face style:name="DejaVu Sans1" svg:font-family="'DejaVu Sans'" style:font-family-generic="swiss"/>
    <style:font-face style:name="DejaVu Sans Mono" svg:font-family="'DejaVu Sans Mono'"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Noto Sans CJK SC"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nos" fo:font-size="24pt" fo:font-weight="bold" style:font-name-asian="Noto Sans CJK SC" style:font-size-asian="24pt" style:font-weight-asian="bold" style:font-name-complex="DejaVu San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327in" style:type="center"/>
          <style:tab-stop style:position="6.6661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nos" fo:font-size="18pt" fo:font-weight="bold" style:font-name-asian="Noto Sans CJK SC" style:font-size-asian="18pt" style:font-weight-asian="bold" style:font-name-complex="DejaVu Sans"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8in" fo:margin-bottom="0.8in" fo:margin-left="1.2043in" fo:margin-right="0.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0.8in" fo:margin-bottom="0.8in" fo:margin-left="1.2in" fo:margin-right="0.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Endnote" style:page-layout-name="Mpm2">
      <style:footer>
        <text:p text:style-name="Footer"/>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as Trenikhin</meta:initial-creator>
    <meta:creation-date>2026-05-01T12:09:13</meta:creation-date>
    <dc:date>2026-05-25T13:28:30</dc:date>
    <dc:creator>Stas Trenikhin</dc:creator>
    <meta:editing-duration>P6DT23H32M58S</meta:editing-duration>
    <meta:editing-cycles>14</meta:editing-cycles>
    <meta:generator>OpenOffice/4.1.15$Unix OpenOffice.org_project/4115m2$Build-9813</meta:generator>
    <meta:printed-by>Stas Trenikhin</meta:printed-by>
    <meta:print-date>2026-05-20T16:56:20</meta:print-date>
    <meta:document-statistic meta:table-count="1" meta:image-count="0" meta:object-count="0" meta:page-count="51" meta:paragraph-count="290" meta:word-count="8526" meta:character-count="74513"/>
  </office:meta>
</office:document-meta>
</file>